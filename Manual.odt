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A000001EB871DB47A.png" manifest:media-type="image/png"/>
  <manifest:file-entry manifest:full-path="Pictures/1001C10D00010CB80000819B983C20DD.svg" manifest:media-type="image/svg+xml"/>
  <manifest:file-entry manifest:full-path="Pictures/100000010000033500000261ACBEA373.png" manifest:media-type="image/png"/>
  <manifest:file-entry manifest:full-path="Pictures/10015F9400010CA40000C7108C295E0A.svg" manifest:media-type="image/svg+xml"/>
  <manifest:file-entry manifest:full-path="Pictures/10000001000003830000022C1278E5F8.png" manifest:media-type="image/png"/>
  <manifest:file-entry manifest:full-path="Pictures/1001723C0000925300005A77E1C612EE.svg" manifest:media-type="image/svg+xml"/>
  <manifest:file-entry manifest:full-path="Pictures/1000000000000300000002937EFD4B0E.png" manifest:media-type="image/png"/>
  <manifest:file-entry manifest:full-path="Pictures/1000000000000A0000000500F59CF76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BeeZee" svg:font-family="ABeeZee"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8e84b" officeooo:paragraph-rsid="0018e84b"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16pt" fo:font-weight="bold" officeooo:rsid="0018e84b" officeooo:paragraph-rsid="0018e84b" style:font-size-asian="16pt" style:font-weight-asian="bold" style:font-size-complex="16pt" style:font-weight-complex="bold"/>
    </style:style>
    <style:style style:name="P3" style:family="paragraph" style:parent-style-name="Standard">
      <style:text-properties fo:font-size="7pt" officeooo:rsid="0018e84b" officeooo:paragraph-rsid="0018e84b" style:font-size-asian="6.09999990463257pt" style:font-size-complex="7pt"/>
    </style:style>
    <style:style style:name="P4" style:family="paragraph" style:parent-style-name="Standard">
      <style:paragraph-properties fo:text-align="center" style:justify-single-word="false"/>
      <style:text-properties fo:font-size="14pt" fo:font-style="italic" officeooo:rsid="0018e84b" officeooo:paragraph-rsid="0018e84b"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size="14pt" fo:font-style="italic" officeooo:rsid="01497b96" officeooo:paragraph-rsid="0018e84b" style:font-size-asian="14pt" style:font-style-asian="italic" style:font-size-complex="14pt" style:font-style-complex="italic"/>
    </style:style>
    <style:style style:name="P6" style:family="paragraph" style:parent-style-name="Standard">
      <style:paragraph-properties fo:text-align="center" style:justify-single-word="false"/>
      <style:text-properties fo:font-size="14pt" fo:font-style="italic" officeooo:rsid="01497b96" officeooo:paragraph-rsid="01bc2171" style:font-size-asian="14pt" style:font-style-asian="italic" style:font-size-complex="14pt" style:font-style-complex="italic"/>
    </style:style>
    <style:style style:name="P7" style:family="paragraph" style:parent-style-name="Standard">
      <style:paragraph-properties fo:text-align="center" style:justify-single-word="false"/>
      <style:text-properties fo:font-style="italic" officeooo:rsid="0018e84b" officeooo:paragraph-rsid="01497b96" style:font-style-asian="italic" style:font-style-complex="italic"/>
    </style:style>
    <style:style style:name="P8" style:family="paragraph" style:parent-style-name="Standard">
      <style:paragraph-properties fo:text-align="center" style:justify-single-word="false"/>
      <style:text-properties officeooo:rsid="0018e84b" officeooo:paragraph-rsid="0018e84b"/>
    </style:style>
    <style:style style:name="P9" style:family="paragraph" style:parent-style-name="Standard">
      <style:paragraph-properties fo:text-align="center" style:justify-single-word="false"/>
      <style:text-properties style:font-name="ABeeZee" officeooo:rsid="01802dce" officeooo:paragraph-rsid="0018e84b"/>
    </style:style>
    <style:style style:name="P10" style:family="paragraph" style:parent-style-name="Standard">
      <style:paragraph-properties fo:text-align="center" style:justify-single-word="false"/>
      <style:text-properties officeooo:rsid="01bc2171" officeooo:paragraph-rsid="01bc2171"/>
    </style:style>
    <style:style style:name="P11" style:family="paragraph" style:parent-style-name="Para">
      <style:paragraph-properties fo:break-before="page"/>
    </style:style>
    <style:style style:name="P12" style:family="paragraph" style:parent-style-name="Standard">
      <style:text-properties officeooo:rsid="001bb253" officeooo:paragraph-rsid="001bb253"/>
    </style:style>
    <style:style style:name="P13" style:family="paragraph" style:parent-style-name="Standard">
      <style:text-properties officeooo:rsid="001bb253" officeooo:paragraph-rsid="003ca6a0"/>
    </style:style>
    <style:style style:name="P14" style:family="paragraph" style:parent-style-name="Para">
      <style:text-properties officeooo:rsid="01972621" officeooo:paragraph-rsid="01972621"/>
    </style:style>
    <style:style style:name="P15" style:family="paragraph" style:parent-style-name="Para">
      <style:text-properties officeooo:rsid="001bb253" officeooo:paragraph-rsid="01972621"/>
    </style:style>
    <style:style style:name="P16" style:family="paragraph" style:parent-style-name="Standard">
      <style:text-properties officeooo:paragraph-rsid="0254b6f8"/>
    </style:style>
    <style:style style:name="P17" style:family="paragraph" style:parent-style-name="Standard">
      <style:text-properties fo:font-style="normal" officeooo:rsid="01771d37" officeooo:paragraph-rsid="01972621" style:font-style-asian="normal" style:font-style-complex="normal"/>
    </style:style>
    <style:style style:name="P18" style:family="paragraph" style:parent-style-name="Standard">
      <style:text-properties officeooo:paragraph-rsid="02172927"/>
    </style:style>
    <style:style style:name="P19" style:family="paragraph" style:parent-style-name="Standard">
      <style:text-properties officeooo:paragraph-rsid="025eb8cb"/>
    </style:style>
    <style:style style:name="P20" style:family="paragraph" style:parent-style-name="Standard">
      <style:text-properties officeooo:rsid="01972621" officeooo:paragraph-rsid="01974e99"/>
    </style:style>
    <style:style style:name="P21" style:family="paragraph" style:parent-style-name="Standard">
      <style:text-properties fo:font-style="normal" officeooo:rsid="01862e9d" officeooo:paragraph-rsid="01974e99" style:font-style-asian="normal" style:font-style-complex="normal"/>
    </style:style>
    <style:style style:name="P22" style:family="paragraph" style:parent-style-name="Standard">
      <style:text-properties officeooo:rsid="001d9f4f" officeooo:paragraph-rsid="001d9f4f"/>
    </style:style>
    <style:style style:name="P23" style:family="paragraph" style:parent-style-name="Standard">
      <style:text-properties fo:font-style="normal" officeooo:rsid="01a58a05" officeooo:paragraph-rsid="002857db" style:font-style-asian="normal" style:font-style-complex="normal"/>
    </style:style>
    <style:style style:name="P24" style:family="paragraph" style:parent-style-name="Para">
      <style:text-properties officeooo:rsid="00252d45" officeooo:paragraph-rsid="00252d45"/>
    </style:style>
    <style:style style:name="P25" style:family="paragraph" style:parent-style-name="Standard">
      <style:text-properties fo:font-style="normal" officeooo:rsid="002734f4" officeooo:paragraph-rsid="002734f4" style:font-style-asian="normal" style:font-style-complex="normal"/>
    </style:style>
    <style:style style:name="P26" style:family="paragraph" style:parent-style-name="Standard">
      <style:text-properties fo:font-style="normal" officeooo:rsid="00270f84" officeooo:paragraph-rsid="00270f84" style:font-style-asian="normal" style:font-style-complex="normal"/>
    </style:style>
    <style:style style:name="P27" style:family="paragraph" style:parent-style-name="Standard">
      <style:text-properties fo:font-style="normal" officeooo:rsid="018ff3d4" officeooo:paragraph-rsid="018ff3d4" style:font-style-asian="normal" style:font-style-complex="normal"/>
    </style:style>
    <style:style style:name="P28" style:family="paragraph" style:parent-style-name="Preformatted_20_Text">
      <style:text-properties fo:font-size="8pt" style:font-size-asian="8pt" style:font-size-complex="8pt"/>
    </style:style>
    <style:style style:name="P29" style:family="paragraph" style:parent-style-name="Standard">
      <style:text-properties fo:font-style="normal" officeooo:rsid="00270f84" officeooo:paragraph-rsid="0254b6f8" style:font-style-asian="normal" style:font-style-complex="normal"/>
    </style:style>
    <style:style style:name="P30" style:family="paragraph" style:parent-style-name="Standard">
      <style:text-properties fo:font-style="normal" officeooo:rsid="00270f84" officeooo:paragraph-rsid="0192e99f" style:font-style-asian="normal" style:font-style-complex="normal"/>
    </style:style>
    <style:style style:name="P31" style:family="paragraph" style:parent-style-name="Standard">
      <style:text-properties officeooo:rsid="0192e99f" officeooo:paragraph-rsid="0192e99f"/>
    </style:style>
    <style:style style:name="P32" style:family="paragraph" style:parent-style-name="Para">
      <style:text-properties officeooo:rsid="02343b96" officeooo:paragraph-rsid="02343b96"/>
    </style:style>
    <style:style style:name="P33" style:family="paragraph" style:parent-style-name="Standard">
      <style:text-properties fo:font-style="normal" officeooo:rsid="0234c833" officeooo:paragraph-rsid="0234c833" style:font-style-asian="normal" style:font-style-complex="normal"/>
    </style:style>
    <style:style style:name="P34" style:family="paragraph" style:parent-style-name="Standard">
      <style:text-properties fo:font-style="normal" officeooo:rsid="0235b69a" officeooo:paragraph-rsid="023ca9af" style:font-style-asian="normal" style:font-style-complex="normal"/>
    </style:style>
    <style:style style:name="P35" style:family="paragraph" style:parent-style-name="Standard">
      <style:text-properties officeooo:rsid="002a9f53" officeooo:paragraph-rsid="002a9f53"/>
    </style:style>
    <style:style style:name="P36" style:family="paragraph" style:parent-style-name="Standard">
      <style:text-properties officeooo:rsid="002a9f53" officeooo:paragraph-rsid="00c761bb"/>
    </style:style>
    <style:style style:name="P37" style:family="paragraph" style:parent-style-name="Standard">
      <style:text-properties officeooo:rsid="0018e84b" officeooo:paragraph-rsid="0018e84b"/>
    </style:style>
    <style:style style:name="P38" style:family="paragraph" style:parent-style-name="Quotations" style:master-page-name="">
      <loext:graphic-properties draw:fill="none"/>
      <style:paragraph-properties fo:margin-left="3cm" fo:margin-right="0.25cm" fo:margin-top="0cm" fo:margin-bottom="0.199cm" style:contextual-spacing="false" fo:text-align="justify" style:justify-single-word="false" fo:text-indent="0cm" style:auto-text-indent="false" style:page-number="auto" fo:background-color="transparent"/>
      <style:text-properties officeooo:paragraph-rsid="013cdc51"/>
    </style:style>
    <style:style style:name="P39" style:family="paragraph" style:parent-style-name="Quotations">
      <loext:graphic-properties draw:fill="none"/>
      <style:paragraph-properties fo:margin-left="3cm" fo:margin-right="0.25cm" fo:margin-top="0cm" fo:margin-bottom="0.499cm" style:contextual-spacing="false" fo:text-align="justify" style:justify-single-word="false" fo:text-indent="0cm" style:auto-text-indent="false" fo:background-color="transparent"/>
      <style:text-properties officeooo:paragraph-rsid="013cdc51"/>
    </style:style>
    <style:style style:name="P40" style:family="paragraph" style:parent-style-name="Standard">
      <style:paragraph-properties fo:text-align="justify" style:justify-single-word="false"/>
      <style:text-properties officeooo:rsid="002ab690" officeooo:paragraph-rsid="002de748"/>
    </style:style>
    <style:style style:name="P41" style:family="paragraph" style:parent-style-name="Standard">
      <style:paragraph-properties fo:text-align="justify" style:justify-single-word="false"/>
      <style:text-properties officeooo:rsid="002ab690" officeooo:paragraph-rsid="002ab690"/>
    </style:style>
    <style:style style:name="P42" style:family="paragraph" style:parent-style-name="Standard">
      <style:paragraph-properties fo:text-align="justify" style:justify-single-word="false"/>
      <style:text-properties officeooo:rsid="002ab690" officeooo:paragraph-rsid="0030713d"/>
    </style:style>
    <style:style style:name="P43" style:family="paragraph" style:parent-style-name="Standard">
      <style:paragraph-properties fo:text-align="justify" style:justify-single-word="false"/>
      <style:text-properties officeooo:rsid="002ab690" officeooo:paragraph-rsid="002c742d"/>
    </style:style>
    <style:style style:name="P44" style:family="paragraph" style:parent-style-name="Standard">
      <style:paragraph-properties fo:text-align="justify" style:justify-single-word="false"/>
      <style:text-properties officeooo:rsid="0018e84b" officeooo:paragraph-rsid="0018e84b"/>
    </style:style>
    <style:style style:name="P45" style:family="paragraph" style:parent-style-name="Quotations" style:master-page-name="">
      <loext:graphic-properties draw:fill="none"/>
      <style:paragraph-properties fo:margin-left="3cm" fo:margin-right="0.25cm" fo:margin-top="0cm" fo:margin-bottom="0.199cm" style:contextual-spacing="false" fo:text-align="justify" style:justify-single-word="false" fo:text-indent="0cm" style:auto-text-indent="false" style:page-number="auto" fo:background-color="transparent"/>
    </style:style>
    <style:style style:name="P46" style:family="paragraph" style:parent-style-name="Quotations">
      <loext:graphic-properties draw:fill="none"/>
      <style:paragraph-properties fo:margin-left="3cm" fo:margin-right="0.25cm" fo:margin-top="0cm" fo:margin-bottom="0.499cm" style:contextual-spacing="false" fo:text-align="justify" style:justify-single-word="false" fo:text-indent="0cm" style:auto-text-indent="false" fo:background-color="transparent"/>
    </style:style>
    <style:style style:name="P47" style:family="paragraph" style:parent-style-name="Standard">
      <style:paragraph-properties fo:text-align="justify" style:justify-single-word="false"/>
      <style:text-properties officeooo:rsid="00430513" officeooo:paragraph-rsid="00430513"/>
    </style:style>
    <style:style style:name="P48" style:family="paragraph" style:parent-style-name="Standard">
      <style:paragraph-properties fo:text-align="justify" style:justify-single-word="false"/>
      <style:text-properties officeooo:rsid="00472e6a" officeooo:paragraph-rsid="00d65acc"/>
    </style:style>
    <style:style style:name="P49" style:family="paragraph" style:parent-style-name="Standard">
      <style:paragraph-properties fo:text-align="justify" style:justify-single-word="false"/>
      <style:text-properties officeooo:rsid="00472e6a" officeooo:paragraph-rsid="00472e6a"/>
    </style:style>
    <style:style style:name="P50" style:family="paragraph" style:parent-style-name="Standard">
      <style:paragraph-properties fo:text-align="justify" style:justify-single-word="false"/>
      <style:text-properties officeooo:rsid="0048920c" officeooo:paragraph-rsid="0048920c"/>
    </style:style>
    <style:style style:name="P51" style:family="paragraph" style:parent-style-name="Standard">
      <style:paragraph-properties fo:text-align="justify" style:justify-single-word="false"/>
      <style:text-properties officeooo:rsid="004bf529" officeooo:paragraph-rsid="004bf529"/>
    </style:style>
    <style:style style:name="P52" style:family="paragraph" style:parent-style-name="Standard">
      <style:paragraph-properties fo:text-align="justify" style:justify-single-word="false"/>
      <style:text-properties officeooo:rsid="0018e84b" officeooo:paragraph-rsid="004bf529"/>
    </style:style>
    <style:style style:name="P53" style:family="paragraph" style:parent-style-name="Para2">
      <style:paragraph-properties fo:break-before="page"/>
    </style:style>
    <style:style style:name="P54" style:family="paragraph" style:parent-style-name="Quotations" style:master-page-name="">
      <loext:graphic-properties draw:fill="none"/>
      <style:paragraph-properties fo:margin-left="3cm" fo:margin-right="0.25cm" fo:margin-top="0cm" fo:margin-bottom="0.199cm" style:contextual-spacing="false" fo:text-align="justify" style:justify-single-word="false" fo:text-indent="0cm" style:auto-text-indent="false" style:page-number="auto" fo:background-color="transparent"/>
      <style:text-properties officeooo:paragraph-rsid="001ae48a"/>
    </style:style>
    <style:style style:name="P55" style:family="paragraph" style:parent-style-name="Quotations">
      <loext:graphic-properties draw:fill="none"/>
      <style:paragraph-properties fo:margin-left="3cm" fo:margin-right="0.25cm" fo:margin-top="0cm" fo:margin-bottom="0.499cm" style:contextual-spacing="false" fo:text-align="justify" style:justify-single-word="false" fo:text-indent="0cm" style:auto-text-indent="false" fo:background-color="transparent"/>
      <style:text-properties officeooo:paragraph-rsid="0018e84b"/>
    </style:style>
    <style:style style:name="P56" style:family="paragraph" style:parent-style-name="Standard">
      <style:text-properties officeooo:rsid="005fefb5" officeooo:paragraph-rsid="006da221"/>
    </style:style>
    <style:style style:name="P57" style:family="paragraph" style:parent-style-name="Standard">
      <style:text-properties officeooo:paragraph-rsid="007b3b16"/>
    </style:style>
    <style:style style:name="P58" style:family="paragraph" style:parent-style-name="Standard">
      <style:text-properties officeooo:rsid="0093f4b1" officeooo:paragraph-rsid="0093f4b1"/>
    </style:style>
    <style:style style:name="P59" style:family="paragraph" style:parent-style-name="Standard">
      <style:text-properties officeooo:rsid="006da221" officeooo:paragraph-rsid="00977239"/>
    </style:style>
    <style:style style:name="P60" style:family="paragraph" style:parent-style-name="Standard">
      <style:text-properties officeooo:rsid="00a778a1" officeooo:paragraph-rsid="00a778a1"/>
    </style:style>
    <style:style style:name="P61" style:family="paragraph" style:parent-style-name="Standard">
      <style:text-properties officeooo:rsid="00ab6b29" officeooo:paragraph-rsid="00ab6b29"/>
    </style:style>
    <style:style style:name="P62" style:family="paragraph" style:parent-style-name="Para2">
      <style:text-properties officeooo:paragraph-rsid="00ab6b29"/>
    </style:style>
    <style:style style:name="P63" style:family="paragraph" style:parent-style-name="Standard">
      <style:text-properties officeooo:rsid="0018e84b" officeooo:paragraph-rsid="00ab6b29"/>
    </style:style>
    <style:style style:name="P64" style:family="paragraph" style:parent-style-name="Standard">
      <style:text-properties officeooo:rsid="00ab6b29" officeooo:paragraph-rsid="00ad0743"/>
    </style:style>
    <style:style style:name="P65" style:family="paragraph" style:parent-style-name="Standard">
      <style:text-properties officeooo:rsid="00ab6b29" officeooo:paragraph-rsid="02571d10"/>
    </style:style>
    <style:style style:name="P66" style:family="paragraph" style:parent-style-name="Standard">
      <style:text-properties officeooo:rsid="00b0e6a0" officeooo:paragraph-rsid="00b0e6a0"/>
    </style:style>
    <style:style style:name="P67" style:family="paragraph" style:parent-style-name="Standard">
      <style:text-properties officeooo:rsid="00b0e6a0" officeooo:paragraph-rsid="023cf7d1"/>
    </style:style>
    <style:style style:name="P68" style:family="paragraph" style:parent-style-name="Standard">
      <style:text-properties fo:font-size="10pt" fo:language="en" fo:country="US" officeooo:rsid="00b0e6a0" officeooo:paragraph-rsid="00b0e6a0"/>
    </style:style>
    <style:style style:name="P69" style:family="paragraph" style:parent-style-name="Standard">
      <style:text-properties officeooo:rsid="00b0e6a0" officeooo:paragraph-rsid="00b2d66e"/>
    </style:style>
    <style:style style:name="P70" style:family="paragraph" style:parent-style-name="Standard">
      <style:text-properties fo:font-size="10pt" fo:language="en" fo:country="US" officeooo:rsid="00b5bd19" officeooo:paragraph-rsid="00b2d66e"/>
    </style:style>
    <style:style style:name="P71" style:family="paragraph" style:parent-style-name="Para2">
      <style:paragraph-properties fo:break-before="page"/>
      <style:text-properties officeooo:paragraph-rsid="00ab6b29"/>
    </style:style>
    <style:style style:name="P72" style:family="paragraph" style:parent-style-name="Para2">
      <style:text-properties officeooo:rsid="0018e84b" officeooo:paragraph-rsid="00ab6b29"/>
    </style:style>
    <style:style style:name="P73" style:family="paragraph" style:parent-style-name="Standard">
      <style:text-properties officeooo:rsid="00b643fa" officeooo:paragraph-rsid="0202b5fc"/>
    </style:style>
    <style:style style:name="P74" style:family="paragraph" style:parent-style-name="Standard">
      <style:text-properties officeooo:rsid="00b643fa" officeooo:paragraph-rsid="00b643fa"/>
    </style:style>
    <style:style style:name="P75" style:family="paragraph" style:parent-style-name="Standard">
      <style:text-properties officeooo:rsid="00b643fa" officeooo:paragraph-rsid="0200926f"/>
    </style:style>
    <style:style style:name="P76" style:family="paragraph" style:parent-style-name="Standard">
      <style:text-properties officeooo:rsid="00ec85b2" officeooo:paragraph-rsid="00ec85b2"/>
    </style:style>
    <style:style style:name="P77" style:family="paragraph" style:parent-style-name="Standard">
      <style:text-properties officeooo:rsid="001fc3ec" officeooo:paragraph-rsid="001fc3ec"/>
    </style:style>
    <style:style style:name="P78" style:family="paragraph" style:parent-style-name="Standard">
      <style:text-properties fo:font-style="normal" officeooo:rsid="00f8cad1" officeooo:paragraph-rsid="001fc3ec" style:font-style-asian="normal" style:font-style-complex="normal"/>
    </style:style>
    <style:style style:name="P79" style:family="paragraph" style:parent-style-name="Standard">
      <style:text-properties officeooo:rsid="001fc3ec" officeooo:paragraph-rsid="01ac04bb"/>
    </style:style>
    <style:style style:name="P80" style:family="paragraph" style:parent-style-name="Standard">
      <style:text-properties fo:font-style="normal" officeooo:rsid="00ef125c" officeooo:paragraph-rsid="001fc3ec" style:font-style-asian="normal" style:font-style-complex="normal"/>
    </style:style>
    <style:style style:name="P81" style:family="paragraph" style:parent-style-name="Standard">
      <style:text-properties fo:font-style="normal" officeooo:rsid="00ec85b2" officeooo:paragraph-rsid="001fc3ec" style:font-style-asian="normal" style:font-style-complex="normal"/>
    </style:style>
    <style:style style:name="P82" style:family="paragraph" style:parent-style-name="Standard">
      <style:text-properties officeooo:rsid="00ec85b2" officeooo:paragraph-rsid="00fe41a4"/>
    </style:style>
    <style:style style:name="P83" style:family="paragraph" style:parent-style-name="Para">
      <style:paragraph-properties fo:break-before="page"/>
      <style:text-properties officeooo:rsid="0286ccae" officeooo:paragraph-rsid="0286ccae"/>
    </style:style>
    <style:style style:name="P84" style:family="paragraph" style:parent-style-name="Standard">
      <style:text-properties fo:font-style="normal" officeooo:rsid="01862e9d" officeooo:paragraph-rsid="0286ccae" style:font-style-asian="normal" style:font-style-complex="normal"/>
    </style:style>
    <style:style style:name="P85" style:family="paragraph" style:parent-style-name="Standard">
      <style:text-properties fo:font-style="normal" officeooo:rsid="0286ccae" officeooo:paragraph-rsid="0286ccae" style:font-style-asian="normal" style:font-style-complex="normal"/>
    </style:style>
    <style:style style:name="P86" style:family="paragraph" style:parent-style-name="Standard">
      <style:text-properties fo:font-style="normal" officeooo:rsid="0286ccae" officeooo:paragraph-rsid="028770e2" style:font-style-asian="normal" style:font-style-complex="normal"/>
    </style:style>
    <style:style style:name="P87" style:family="paragraph" style:parent-style-name="Standard">
      <style:text-properties fo:font-style="normal" officeooo:rsid="028770e2" officeooo:paragraph-rsid="028770e2" style:font-style-asian="normal" style:font-style-complex="normal"/>
    </style:style>
    <style:style style:name="P88" style:family="paragraph" style:parent-style-name="Standard">
      <style:text-properties officeooo:paragraph-rsid="028770e2"/>
    </style:style>
    <style:style style:name="P89" style:family="paragraph" style:parent-style-name="Para">
      <style:paragraph-properties fo:break-before="page"/>
      <style:text-properties officeooo:rsid="012ff66e" officeooo:paragraph-rsid="012ff66e"/>
    </style:style>
    <style:style style:name="P90" style:family="paragraph" style:parent-style-name="Standard">
      <style:text-properties fo:font-style="normal" officeooo:rsid="00fb869e" officeooo:paragraph-rsid="012ff66e" style:font-style-asian="normal" style:font-style-complex="normal"/>
    </style:style>
    <style:style style:name="P91" style:family="paragraph" style:parent-style-name="Standard">
      <style:text-properties fo:font-style="normal" officeooo:rsid="012ff66e" officeooo:paragraph-rsid="0254b6f8" style:font-style-asian="normal" style:font-style-complex="normal"/>
    </style:style>
    <style:style style:name="P92" style:family="paragraph" style:parent-style-name="Standard">
      <style:text-properties fo:font-style="normal" officeooo:rsid="012ff66e" officeooo:paragraph-rsid="012ff66e" style:font-style-asian="normal" style:font-style-complex="normal"/>
    </style:style>
    <style:style style:name="P93" style:family="paragraph" style:parent-style-name="Standard" style:list-style-name="L1" style:master-page-name="">
      <loext:graphic-properties draw:fill="none"/>
      <style:paragraph-properties fo:margin-left="0.7cm" fo:margin-right="0cm" fo:text-align="justify" style:justify-single-word="false" fo:text-indent="-0.3cm" style:auto-text-indent="false" style:page-number="auto" fo:background-color="transparent"/>
      <style:text-properties fo:font-style="normal" officeooo:rsid="012ff66e" officeooo:paragraph-rsid="012ff66e" style:font-style-asian="normal" style:font-style-complex="normal"/>
    </style:style>
    <style:style style:name="P94" style:family="paragraph" style:parent-style-name="Standard" style:list-style-name="L1">
      <loext:graphic-properties draw:fill="none"/>
      <style:paragraph-properties fo:margin-left="0.7cm" fo:margin-right="0cm" fo:text-align="justify" style:justify-single-word="false" fo:text-indent="-0.3cm" style:auto-text-indent="false" fo:background-color="transparent"/>
      <style:text-properties fo:font-size="8pt" fo:font-style="normal" officeooo:rsid="01acbe9c" officeooo:paragraph-rsid="01acbe9c" style:font-size-asian="8pt" style:font-style-asian="normal" style:font-size-complex="8pt" style:font-style-complex="normal"/>
    </style:style>
    <style:style style:name="P95" style:family="paragraph" style:parent-style-name="Standard" style:list-style-name="L1">
      <loext:graphic-properties draw:fill="none"/>
      <style:paragraph-properties fo:margin-left="0.7cm" fo:margin-right="0cm" fo:text-align="justify" style:justify-single-word="false" fo:text-indent="-0.3cm" style:auto-text-indent="false" fo:background-color="transparent"/>
      <style:text-properties fo:font-style="normal" officeooo:rsid="012ff66e" officeooo:paragraph-rsid="01acbe9c" style:font-style-asian="normal" style:font-style-complex="normal"/>
    </style:style>
    <style:style style:name="P96" style:family="paragraph" style:parent-style-name="Standard" style:list-style-name="L1">
      <loext:graphic-properties draw:fill="none"/>
      <style:paragraph-properties fo:margin-left="0.7cm" fo:margin-right="0cm" fo:text-align="justify" style:justify-single-word="false" fo:text-indent="-0.3cm" style:auto-text-indent="false" fo:background-color="transparent"/>
      <style:text-properties fo:font-style="normal" officeooo:rsid="012ff66e" officeooo:paragraph-rsid="0290b2d2" style:font-style-asian="normal" style:font-style-complex="normal"/>
    </style:style>
    <style:style style:name="P97" style:family="paragraph" style:parent-style-name="Standard" style:list-style-name="L1">
      <loext:graphic-properties draw:fill="none"/>
      <style:paragraph-properties fo:margin-left="0.7cm" fo:margin-right="0cm" fo:text-align="justify" style:justify-single-word="false" fo:text-indent="-0.3cm" style:auto-text-indent="false" fo:background-color="transparent"/>
      <style:text-properties fo:font-style="normal" officeooo:rsid="028eef94" officeooo:paragraph-rsid="028eef94" style:font-style-asian="normal" style:font-style-complex="normal"/>
    </style:style>
    <style:style style:name="P98" style:family="paragraph" style:parent-style-name="Standard" style:list-style-name="L1">
      <loext:graphic-properties draw:fill="none"/>
      <style:paragraph-properties fo:margin-left="0.7cm" fo:margin-right="0cm" fo:text-align="justify" style:justify-single-word="false" fo:text-indent="-0.3cm" style:auto-text-indent="false" fo:background-color="transparent"/>
      <style:text-properties fo:font-size="8pt" fo:font-style="normal" officeooo:rsid="01acbe9c" officeooo:paragraph-rsid="028eef94" style:font-size-asian="8pt" style:font-style-asian="normal" style:font-size-complex="8pt" style:font-style-complex="normal"/>
    </style:style>
    <style:style style:name="P99" style:family="paragraph" style:parent-style-name="Standard">
      <loext:graphic-properties draw:fill="none"/>
      <style:paragraph-properties fo:margin-left="0.7cm" fo:margin-right="0cm" fo:text-align="justify" style:justify-single-word="false" fo:text-indent="-0.3cm" style:auto-text-indent="false" fo:background-color="transparent"/>
      <style:text-properties fo:font-size="8pt" fo:font-style="normal" officeooo:rsid="01acbe9c" officeooo:paragraph-rsid="01acbe9c" style:font-size-asian="8pt" style:font-style-asian="normal" style:font-size-complex="8pt" style:font-style-complex="normal"/>
    </style:style>
    <style:style style:name="P100" style:family="paragraph" style:parent-style-name="Standard" style:list-style-name="L1">
      <loext:graphic-properties draw:fill="none"/>
      <style:paragraph-properties fo:margin-left="0.7cm" fo:margin-right="0cm" fo:text-align="justify" style:justify-single-word="false" fo:text-indent="-0.3cm" style:auto-text-indent="false" fo:background-color="transparent"/>
      <style:text-properties fo:font-style="normal" officeooo:rsid="012ff66e" officeooo:paragraph-rsid="01d29239" style:font-style-asian="normal" style:font-style-complex="normal"/>
    </style:style>
    <style:style style:name="P101" style:family="paragraph" style:parent-style-name="Standard" style:list-style-name="L1">
      <loext:graphic-properties draw:fill="none"/>
      <style:paragraph-properties fo:margin-left="0.7cm" fo:margin-right="0cm" fo:text-align="justify" style:justify-single-word="false" fo:text-indent="-0.3cm" style:auto-text-indent="false" fo:background-color="transparent"/>
      <style:text-properties fo:font-size="8pt" fo:font-style="normal" officeooo:rsid="01acbe9c" officeooo:paragraph-rsid="01d29239" style:font-size-asian="8pt" style:font-style-asian="normal" style:font-size-complex="8pt" style:font-style-complex="normal"/>
    </style:style>
    <style:style style:name="P102" style:family="paragraph" style:parent-style-name="Para">
      <style:text-properties fo:font-style="normal" officeooo:rsid="01bc2171" style:font-style-asian="normal" style:font-style-complex="normal"/>
    </style:style>
    <style:style style:name="P103" style:family="paragraph" style:parent-style-name="Standard">
      <style:text-properties officeooo:rsid="01134bbf" officeooo:paragraph-rsid="01b5095c"/>
    </style:style>
    <style:style style:name="P104" style:family="paragraph" style:parent-style-name="Standard">
      <style:text-properties officeooo:rsid="01134bbf" officeooo:paragraph-rsid="01134bbf"/>
    </style:style>
    <style:style style:name="P105" style:family="paragraph" style:parent-style-name="Standard">
      <style:text-properties officeooo:rsid="011774d3" officeooo:paragraph-rsid="01b4ff14"/>
    </style:style>
    <style:style style:name="P106" style:family="paragraph" style:parent-style-name="Standard">
      <style:text-properties officeooo:rsid="01134bbf" officeooo:paragraph-rsid="011a27b1"/>
    </style:style>
    <style:style style:name="P107" style:family="paragraph" style:parent-style-name="Standard">
      <style:text-properties officeooo:rsid="01964824" officeooo:paragraph-rsid="01964824"/>
    </style:style>
    <style:style style:name="P108" style:family="paragraph" style:parent-style-name="Para">
      <style:paragraph-properties fo:break-before="page"/>
      <style:text-properties officeooo:paragraph-rsid="01c162bc"/>
    </style:style>
    <style:style style:name="P109" style:family="paragraph" style:parent-style-name="Standard">
      <style:text-properties officeooo:rsid="01c162bc" officeooo:paragraph-rsid="01c162bc"/>
    </style:style>
    <style:style style:name="P110" style:family="paragraph" style:parent-style-name="Para2">
      <style:text-properties officeooo:paragraph-rsid="01c162bc"/>
    </style:style>
    <style:style style:name="P111" style:family="paragraph" style:parent-style-name="Para2">
      <style:text-properties fo:font-size="11pt" officeooo:paragraph-rsid="01c162bc" style:font-size-asian="9.60000038146973pt" style:font-size-complex="11pt"/>
    </style:style>
    <style:style style:name="P112" style:family="paragraph" style:parent-style-name="Standard">
      <style:text-properties fo:font-style="normal" officeooo:rsid="01c7a39f" officeooo:paragraph-rsid="01c7a39f" style:font-style-asian="normal" style:font-style-complex="normal"/>
    </style:style>
    <style:style style:name="P113" style:family="paragraph" style:parent-style-name="Standard">
      <style:text-properties fo:font-style="normal" officeooo:rsid="02923ef1" officeooo:paragraph-rsid="02923ef1" style:font-style-asian="normal" style:font-style-complex="normal"/>
    </style:style>
    <style:style style:name="P114" style:family="paragraph" style:parent-style-name="Para2">
      <style:text-properties fo:font-size="11pt" style:font-size-asian="9.60000038146973pt" style:font-size-complex="11pt"/>
    </style:style>
    <style:style style:name="P115" style:family="paragraph" style:parent-style-name="Standard">
      <style:text-properties officeooo:rsid="011934cd" officeooo:paragraph-rsid="01ac6652"/>
    </style:style>
    <style:style style:name="P116" style:family="paragraph" style:parent-style-name="Standard">
      <style:text-properties officeooo:rsid="011934cd" officeooo:paragraph-rsid="011934cd"/>
    </style:style>
    <style:style style:name="P117" style:family="paragraph" style:parent-style-name="Standard">
      <style:text-properties fo:font-size="8pt" officeooo:rsid="011934cd" officeooo:paragraph-rsid="02459dd0" style:font-size-asian="8pt" style:font-size-complex="8pt"/>
    </style:style>
    <style:style style:name="P118" style:family="paragraph" style:parent-style-name="Standard">
      <style:text-properties officeooo:rsid="00e1b81b" officeooo:paragraph-rsid="00e9cde9"/>
    </style:style>
    <style:style style:name="P119" style:family="paragraph" style:parent-style-name="Standard">
      <style:paragraph-properties fo:text-align="start" style:justify-single-word="false"/>
      <style:text-properties officeooo:rsid="00e4cbe4" officeooo:paragraph-rsid="00e9cde9"/>
    </style:style>
    <style:style style:name="P120" style:family="paragraph" style:parent-style-name="Standard">
      <style:text-properties fo:font-size="8pt" officeooo:rsid="00e1b81b" officeooo:paragraph-rsid="00e1b81b" style:font-size-asian="8pt" style:font-size-complex="8pt"/>
    </style:style>
    <style:style style:name="P121" style:family="paragraph" style:parent-style-name="Standard">
      <style:text-properties fo:font-size="9pt" officeooo:rsid="00e1b81b" officeooo:paragraph-rsid="00e1b81b" style:font-size-asian="9pt" style:font-size-complex="9pt"/>
    </style:style>
    <style:style style:name="P122" style:family="paragraph" style:parent-style-name="Standard">
      <style:text-properties fo:font-size="10pt" officeooo:rsid="00e1b81b" officeooo:paragraph-rsid="01064a41" style:font-size-asian="10pt" style:font-size-complex="10pt"/>
    </style:style>
    <style:style style:name="P123" style:family="paragraph" style:parent-style-name="Standard">
      <style:text-properties fo:font-size="10pt" officeooo:rsid="00e4cbe4" officeooo:paragraph-rsid="01064a41" style:font-size-asian="10pt" style:font-size-complex="10pt"/>
    </style:style>
    <style:style style:name="P124" style:family="paragraph" style:parent-style-name="Standard">
      <style:text-properties fo:font-size="8pt" officeooo:rsid="00e1b81b" officeooo:paragraph-rsid="01064a41" style:font-size-asian="8pt" style:font-size-complex="8pt"/>
    </style:style>
    <style:style style:name="P125" style:family="paragraph" style:parent-style-name="Standard">
      <style:text-properties fo:font-size="9pt" officeooo:rsid="00e1b81b" officeooo:paragraph-rsid="01064a41" style:font-size-asian="9pt" style:font-size-complex="9pt"/>
    </style:style>
    <style:style style:name="P126" style:family="paragraph" style:parent-style-name="Standard">
      <style:text-properties officeooo:paragraph-rsid="01068ef5"/>
    </style:style>
    <style:style style:name="P127" style:family="paragraph" style:parent-style-name="Standard">
      <style:text-properties fo:font-size="10pt" officeooo:rsid="00e1b81b" officeooo:paragraph-rsid="01068ef5" style:font-size-asian="10pt" style:font-size-complex="10pt"/>
    </style:style>
    <style:style style:name="P128" style:family="paragraph" style:parent-style-name="Standard">
      <style:text-properties fo:font-size="10pt" officeooo:rsid="00e4cbe4" officeooo:paragraph-rsid="01068ef5" style:font-size-asian="10pt" style:font-size-complex="10pt"/>
    </style:style>
    <style:style style:name="P129" style:family="paragraph" style:parent-style-name="Standard">
      <style:text-properties fo:font-size="8pt" officeooo:rsid="00e1b81b" officeooo:paragraph-rsid="01068ef5" style:font-size-asian="8pt" style:font-size-complex="8pt"/>
    </style:style>
    <style:style style:name="P130" style:family="paragraph" style:parent-style-name="Standard">
      <style:text-properties fo:font-size="9pt" officeooo:rsid="00e1b81b" officeooo:paragraph-rsid="01068ef5" style:font-size-asian="9pt" style:font-size-complex="9pt"/>
    </style:style>
    <style:style style:name="P131" style:family="paragraph" style:parent-style-name="Standard">
      <style:text-properties officeooo:paragraph-rsid="0106b576"/>
    </style:style>
    <style:style style:name="P132" style:family="paragraph" style:parent-style-name="Standard">
      <style:text-properties fo:font-size="10pt" officeooo:rsid="00e1b81b" officeooo:paragraph-rsid="0106b576" style:font-size-asian="10pt" style:font-size-complex="10pt"/>
    </style:style>
    <style:style style:name="P133" style:family="paragraph" style:parent-style-name="Standard">
      <style:text-properties fo:font-size="10pt" officeooo:rsid="00e4cbe4" officeooo:paragraph-rsid="011d5699" style:font-size-asian="10pt" style:font-size-complex="10pt"/>
    </style:style>
    <style:style style:name="P134" style:family="paragraph" style:parent-style-name="Standard">
      <style:text-properties fo:font-size="8pt" officeooo:rsid="00e1b81b" officeooo:paragraph-rsid="029426ac" style:font-size-asian="8pt" style:font-size-complex="8pt"/>
    </style:style>
    <style:style style:name="P135" style:family="paragraph" style:parent-style-name="Para3">
      <style:text-properties officeooo:paragraph-rsid="029426ac"/>
    </style:style>
    <style:style style:name="P136" style:family="paragraph" style:parent-style-name="Standard">
      <style:text-properties officeooo:paragraph-rsid="029426ac"/>
    </style:style>
    <style:style style:name="P137" style:family="paragraph" style:parent-style-name="Standard">
      <style:text-properties fo:font-size="10pt" officeooo:rsid="00e1b81b" officeooo:paragraph-rsid="029426ac" style:font-size-asian="10pt" style:font-size-complex="10pt"/>
    </style:style>
    <style:style style:name="P138" style:family="paragraph" style:parent-style-name="Standard">
      <style:text-properties fo:font-size="10pt" officeooo:rsid="00e4cbe4" officeooo:paragraph-rsid="029426ac" style:font-size-asian="10pt" style:font-size-complex="10pt"/>
    </style:style>
    <style:style style:name="P139" style:family="paragraph" style:parent-style-name="Standard">
      <style:text-properties fo:font-size="8pt" officeooo:rsid="00e1b81b" officeooo:paragraph-rsid="0106b576" style:font-size-asian="8pt" style:font-size-complex="8pt"/>
    </style:style>
    <style:style style:name="P140" style:family="paragraph" style:parent-style-name="Standard">
      <style:text-properties officeooo:paragraph-rsid="01083c4b"/>
    </style:style>
    <style:style style:name="P141" style:family="paragraph" style:parent-style-name="Standard">
      <style:text-properties fo:font-size="10pt" officeooo:rsid="00e1b81b" officeooo:paragraph-rsid="01083c4b" style:font-size-asian="10pt" style:font-size-complex="10pt"/>
    </style:style>
    <style:style style:name="P142" style:family="paragraph" style:parent-style-name="Standard">
      <style:text-properties fo:font-size="8pt" officeooo:rsid="00e1b81b" officeooo:paragraph-rsid="01083c4b" style:font-size-asian="8pt" style:font-size-complex="8pt"/>
    </style:style>
    <style:style style:name="P143" style:family="paragraph" style:parent-style-name="Standard">
      <style:text-properties fo:font-size="10pt" officeooo:paragraph-rsid="0108c57f" style:font-size-asian="10pt" style:font-size-complex="10pt"/>
    </style:style>
    <style:style style:name="P144" style:family="paragraph" style:parent-style-name="Standard">
      <style:text-properties fo:font-size="10pt" officeooo:rsid="00e1b81b" officeooo:paragraph-rsid="0108c57f" style:font-size-asian="10pt" style:font-size-complex="10pt"/>
    </style:style>
    <style:style style:name="P145" style:family="paragraph" style:parent-style-name="Standard">
      <style:text-properties fo:font-size="8pt" officeooo:rsid="00e1b81b" officeooo:paragraph-rsid="0108c57f" style:font-size-asian="8pt" style:font-size-complex="8pt"/>
    </style:style>
    <style:style style:name="P146" style:family="paragraph" style:parent-style-name="Standard">
      <style:text-properties officeooo:paragraph-rsid="01c4f291"/>
    </style:style>
    <style:style style:name="P147" style:family="paragraph" style:parent-style-name="Standard">
      <style:text-properties fo:font-size="10pt" officeooo:rsid="00e1b81b" officeooo:paragraph-rsid="01c4f291" style:font-size-asian="10pt" style:font-size-complex="10pt"/>
    </style:style>
    <style:style style:name="P148" style:family="paragraph" style:parent-style-name="Standard">
      <style:text-properties fo:font-size="8pt" officeooo:rsid="00e1b81b" officeooo:paragraph-rsid="01c4f291" style:font-size-asian="8pt" style:font-size-complex="8pt"/>
    </style:style>
    <style:style style:name="P149" style:family="paragraph" style:parent-style-name="Standard">
      <style:text-properties officeooo:rsid="00e1b81b" officeooo:paragraph-rsid="0209448d"/>
    </style:style>
    <style:style style:name="P150" style:family="paragraph" style:parent-style-name="Standard">
      <style:paragraph-properties fo:text-align="start" style:justify-single-word="false"/>
      <style:text-properties officeooo:rsid="00e4cbe4" officeooo:paragraph-rsid="0209448d"/>
    </style:style>
    <style:style style:name="P151" style:family="paragraph" style:parent-style-name="Standard">
      <style:paragraph-properties fo:text-align="start" style:justify-single-word="false"/>
      <style:text-properties fo:font-size="8pt" officeooo:rsid="00e1b81b" officeooo:paragraph-rsid="0209448d" style:font-size-asian="8pt" style:font-size-complex="8pt"/>
    </style:style>
    <style:style style:name="P152" style:family="paragraph" style:parent-style-name="Standard">
      <style:text-properties officeooo:paragraph-rsid="010c0b7b"/>
    </style:style>
    <style:style style:name="P153" style:family="paragraph" style:parent-style-name="Standard">
      <style:text-properties fo:font-size="10pt" officeooo:rsid="00e1b81b" officeooo:paragraph-rsid="010c0b7b" style:font-size-asian="10pt" style:font-size-complex="10pt"/>
    </style:style>
    <style:style style:name="P154" style:family="paragraph" style:parent-style-name="Standard">
      <style:text-properties fo:font-size="9pt" officeooo:rsid="00e4cbe4" officeooo:paragraph-rsid="011d5699" style:font-size-asian="9pt" style:font-size-complex="9pt"/>
    </style:style>
    <style:style style:name="P155" style:family="paragraph" style:parent-style-name="Standard">
      <style:text-properties fo:font-size="8pt" officeooo:rsid="00e1b81b" officeooo:paragraph-rsid="010c0b7b" style:font-size-asian="8pt" style:font-size-complex="8pt"/>
    </style:style>
    <style:style style:name="P156" style:family="paragraph" style:parent-style-name="Standard">
      <style:text-properties fo:font-size="8pt" officeooo:rsid="01c4f291" officeooo:paragraph-rsid="01c4f291" style:font-size-asian="8pt" style:font-size-complex="8pt"/>
    </style:style>
    <style:style style:name="P157" style:family="paragraph" style:parent-style-name="Standard">
      <style:text-properties officeooo:paragraph-rsid="010dbfd4"/>
    </style:style>
    <style:style style:name="P158" style:family="paragraph" style:parent-style-name="Standard">
      <style:text-properties fo:font-size="10pt" officeooo:rsid="00e1b81b" officeooo:paragraph-rsid="010dbfd4" style:font-size-asian="10pt" style:font-size-complex="10pt"/>
    </style:style>
    <style:style style:name="P159" style:family="paragraph" style:parent-style-name="Standard">
      <style:text-properties fo:font-size="8pt" officeooo:rsid="00e1b81b" officeooo:paragraph-rsid="010dbfd4" style:font-size-asian="8pt" style:font-size-complex="8pt"/>
    </style:style>
    <style:style style:name="P160" style:family="paragraph" style:parent-style-name="Standard">
      <style:text-properties fo:font-size="10pt" officeooo:rsid="00e1b81b" officeooo:paragraph-rsid="0108c57f" style:font-size-asian="8.75pt" style:font-size-complex="10pt"/>
    </style:style>
    <style:style style:name="P161" style:family="paragraph" style:parent-style-name="Standard">
      <style:text-properties officeooo:paragraph-rsid="01100d90"/>
    </style:style>
    <style:style style:name="P162" style:family="paragraph" style:parent-style-name="Standard">
      <style:text-properties fo:font-size="10pt" officeooo:rsid="00e1b81b" officeooo:paragraph-rsid="01100d90" style:font-size-asian="10pt" style:font-size-complex="10pt"/>
    </style:style>
    <style:style style:name="P163" style:family="paragraph" style:parent-style-name="Para3">
      <style:text-properties officeooo:paragraph-rsid="029433a8"/>
    </style:style>
    <style:style style:name="P164" style:family="paragraph" style:parent-style-name="Standard">
      <style:text-properties officeooo:paragraph-rsid="029433a8"/>
    </style:style>
    <style:style style:name="P165" style:family="paragraph" style:parent-style-name="Standard">
      <style:text-properties fo:font-size="10pt" officeooo:rsid="00e1b81b" officeooo:paragraph-rsid="029433a8" style:font-size-asian="10pt" style:font-size-complex="10pt"/>
    </style:style>
    <style:style style:name="P166" style:family="paragraph" style:parent-style-name="Standard">
      <style:text-properties fo:font-size="10pt" officeooo:rsid="00e4cbe4" officeooo:paragraph-rsid="029433a8" style:font-size-asian="10pt" style:font-size-complex="10pt"/>
    </style:style>
    <style:style style:name="P167" style:family="paragraph" style:parent-style-name="Standard">
      <style:text-properties fo:font-size="8pt" officeooo:rsid="00e1b81b" officeooo:paragraph-rsid="029433a8" style:font-size-asian="8pt" style:font-size-complex="8pt"/>
    </style:style>
    <style:style style:name="P168" style:family="paragraph" style:parent-style-name="Para2">
      <style:text-properties officeooo:rsid="01134bbf" officeooo:paragraph-rsid="01c4f291"/>
    </style:style>
    <style:style style:name="P169" style:family="paragraph" style:parent-style-name="Standard">
      <style:text-properties fo:font-size="10pt" officeooo:rsid="01134bbf" officeooo:paragraph-rsid="01134bbf" style:font-size-asian="8.75pt" style:font-size-complex="10pt"/>
    </style:style>
    <style:style style:name="P170" style:family="paragraph" style:parent-style-name="Standard">
      <style:text-properties fo:font-size="10pt" officeooo:rsid="00e1b81b" officeooo:paragraph-rsid="00e1b81b" style:font-size-asian="8.75pt" style:font-size-complex="10pt"/>
    </style:style>
    <style:style style:name="P171" style:family="paragraph" style:parent-style-name="Standard">
      <style:text-properties fo:font-size="10pt" officeooo:rsid="010dd4a9" officeooo:paragraph-rsid="010dd4a9" style:font-size-asian="8.75pt" style:font-size-complex="10pt"/>
    </style:style>
    <style:style style:name="P172" style:family="paragraph" style:parent-style-name="Standard">
      <style:text-properties fo:font-size="10pt" officeooo:rsid="00e1b81b" officeooo:paragraph-rsid="010c0b7b" style:font-size-asian="8.75pt" style:font-size-complex="10pt"/>
    </style:style>
    <style:style style:name="P173" style:family="paragraph" style:parent-style-name="Standard">
      <style:text-properties officeooo:rsid="00e1b81b" officeooo:paragraph-rsid="00e1d282"/>
    </style:style>
    <style:style style:name="P174" style:family="paragraph" style:parent-style-name="Standard">
      <style:text-properties fo:font-size="10pt" officeooo:rsid="01c7e4e4" officeooo:paragraph-rsid="01c7e4e4" style:font-size-asian="10pt" style:font-size-complex="10pt"/>
    </style:style>
    <style:style style:name="T1" style:family="text">
      <style:text-properties officeooo:rsid="002162e3"/>
    </style:style>
    <style:style style:name="T2" style:family="text">
      <style:text-properties officeooo:rsid="01bc2171"/>
    </style:style>
    <style:style style:name="T3" style:family="text">
      <style:text-properties officeooo:rsid="025eb8cb"/>
    </style:style>
    <style:style style:name="T4" style:family="text">
      <style:text-properties officeooo:rsid="007466f2"/>
    </style:style>
    <style:style style:name="T5" style:family="text">
      <style:text-properties officeooo:rsid="0074df72"/>
    </style:style>
    <style:style style:name="T6" style:family="text">
      <style:text-properties officeooo:rsid="003ca6a0"/>
    </style:style>
    <style:style style:name="T7" style:family="text">
      <style:text-properties officeooo:rsid="002209aa"/>
    </style:style>
    <style:style style:name="T8" style:family="text">
      <style:text-properties officeooo:rsid="00430513"/>
    </style:style>
    <style:style style:name="T9" style:family="text">
      <style:text-properties fo:font-style="normal" officeooo:rsid="01972621"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italic" officeooo:rsid="017661c0" style:font-style-asian="italic" style:font-style-complex="italic"/>
    </style:style>
    <style:style style:name="T12" style:family="text">
      <style:text-properties fo:font-style="normal" officeooo:rsid="0254b6f8" style:font-style-asian="normal" style:font-style-complex="normal"/>
    </style:style>
    <style:style style:name="T13" style:family="text">
      <style:text-properties fo:font-style="normal" officeooo:rsid="0253c83a" style:font-style-asian="normal" style:font-style-complex="normal"/>
    </style:style>
    <style:style style:name="T14" style:family="text">
      <style:text-properties fo:font-style="italic" officeooo:rsid="0199dabf" style:font-style-asian="italic" style:font-style-complex="italic"/>
    </style:style>
    <style:style style:name="T15" style:family="text">
      <style:text-properties fo:font-style="italic" officeooo:rsid="0253c83a" style:font-style-asian="italic" style:font-style-complex="italic"/>
    </style:style>
    <style:style style:name="T16" style:family="text">
      <style:text-properties fo:font-style="normal" officeooo:rsid="0199dabf" style:font-style-asian="normal" style:font-style-complex="normal"/>
    </style:style>
    <style:style style:name="T17" style:family="text">
      <style:text-properties fo:font-style="normal" officeooo:rsid="002734f4" style:font-style-asian="normal" style:font-style-complex="normal"/>
    </style:style>
    <style:style style:name="T18" style:family="text">
      <style:text-properties fo:font-style="normal" officeooo:rsid="00d1e0f3" style:font-style-asian="normal" style:font-style-complex="normal"/>
    </style:style>
    <style:style style:name="T19" style:family="text">
      <style:text-properties fo:font-style="normal" officeooo:rsid="01771d37" style:font-style-asian="normal" style:font-style-complex="normal"/>
    </style:style>
    <style:style style:name="T20" style:family="text">
      <style:text-properties fo:font-style="normal" officeooo:rsid="01779923" style:font-style-asian="normal" style:font-style-complex="normal"/>
    </style:style>
    <style:style style:name="T21" style:family="text">
      <style:text-properties fo:font-style="normal" officeooo:rsid="017731f0" style:font-style-asian="normal" style:font-style-complex="normal"/>
    </style:style>
    <style:style style:name="T22" style:family="text">
      <style:text-properties fo:font-style="normal" officeooo:rsid="0177cdd3" style:font-style-asian="normal" style:font-style-complex="normal"/>
    </style:style>
    <style:style style:name="T23" style:family="text">
      <style:text-properties officeooo:rsid="017661c0"/>
    </style:style>
    <style:style style:name="T24" style:family="text">
      <style:text-properties officeooo:rsid="01972621"/>
    </style:style>
    <style:style style:name="T25" style:family="text">
      <style:text-properties officeooo:rsid="02172927"/>
    </style:style>
    <style:style style:name="T26" style:family="text">
      <style:text-properties officeooo:rsid="01974e99"/>
    </style:style>
    <style:style style:name="T27" style:family="text">
      <style:text-properties officeooo:rsid="01a0cba0"/>
    </style:style>
    <style:style style:name="T28" style:family="text">
      <style:text-properties officeooo:rsid="019cc9ee"/>
    </style:style>
    <style:style style:name="T29" style:family="text">
      <style:text-properties officeooo:rsid="01dce461"/>
    </style:style>
    <style:style style:name="T30" style:family="text">
      <style:text-properties officeooo:rsid="019ec1f0"/>
    </style:style>
    <style:style style:name="T31" style:family="text">
      <style:text-properties officeooo:rsid="01de3c61"/>
    </style:style>
    <style:style style:name="T32" style:family="text">
      <style:text-properties officeooo:rsid="019f1d64"/>
    </style:style>
    <style:style style:name="T33" style:family="text">
      <style:text-properties officeooo:rsid="01dfd477"/>
    </style:style>
    <style:style style:name="T34" style:family="text">
      <style:text-properties officeooo:rsid="01e133b8"/>
    </style:style>
    <style:style style:name="T35" style:family="text">
      <style:text-properties fo:font-style="italic" officeooo:rsid="0018e84b" style:font-style-asian="italic" style:font-style-complex="italic"/>
    </style:style>
    <style:style style:name="T36" style:family="text">
      <style:text-properties officeooo:rsid="0286ccae"/>
    </style:style>
    <style:style style:name="T37" style:family="text">
      <style:text-properties officeooo:rsid="0187450d"/>
    </style:style>
    <style:style style:name="T38" style:family="text">
      <style:text-properties officeooo:rsid="01e135cd"/>
    </style:style>
    <style:style style:name="T39" style:family="text">
      <style:text-properties officeooo:rsid="0193f7a3"/>
    </style:style>
    <style:style style:name="T40" style:family="text">
      <style:text-properties officeooo:rsid="0187c869"/>
    </style:style>
    <style:style style:name="T41" style:family="text">
      <style:text-properties officeooo:rsid="018b082f"/>
    </style:style>
    <style:style style:name="T42" style:family="text">
      <style:text-properties fo:font-style="italic" officeooo:rsid="002857db" style:font-style-asian="italic" style:font-style-complex="italic"/>
    </style:style>
    <style:style style:name="T43" style:family="text">
      <style:text-properties fo:font-style="normal" officeooo:rsid="002857db" style:font-style-asian="normal" style:font-style-complex="normal"/>
    </style:style>
    <style:style style:name="T44" style:family="text">
      <style:text-properties fo:font-style="normal" officeooo:rsid="0029f838" style:font-style-asian="normal" style:font-style-complex="normal"/>
    </style:style>
    <style:style style:name="T45" style:family="text">
      <style:text-properties fo:font-style="normal" officeooo:rsid="003d24ca" style:font-style-asian="normal" style:font-style-complex="normal"/>
    </style:style>
    <style:style style:name="T46" style:family="text">
      <style:text-properties fo:font-style="normal" officeooo:rsid="01a58a05" style:font-style-asian="normal" style:font-style-complex="normal"/>
    </style:style>
    <style:style style:name="T47" style:family="text">
      <style:text-properties fo:font-style="normal" officeooo:rsid="026089f7" style:font-style-asian="normal" style:font-style-complex="normal"/>
    </style:style>
    <style:style style:name="T48" style:family="text">
      <style:text-properties fo:font-style="normal" officeooo:rsid="01a6899a" style:font-style-asian="normal" style:font-style-complex="normal"/>
    </style:style>
    <style:style style:name="T49" style:family="text">
      <style:text-properties officeooo:rsid="00252d45"/>
    </style:style>
    <style:style style:name="T50" style:family="text">
      <style:text-properties officeooo:rsid="017237c4"/>
    </style:style>
    <style:style style:name="T51" style:family="text">
      <style:text-properties fo:font-style="normal" officeooo:rsid="017237c4" style:font-style-asian="normal" style:font-style-complex="normal"/>
    </style:style>
    <style:style style:name="T52" style:family="text">
      <style:text-properties officeooo:rsid="02135181"/>
    </style:style>
    <style:style style:name="T53" style:family="text">
      <style:text-properties style:font-name="Liberation Mono" fo:font-size="8pt" officeooo:rsid="017237c4" style:font-size-asian="8pt" style:font-size-complex="8pt"/>
    </style:style>
    <style:style style:name="T54" style:family="text">
      <style:text-properties style:font-name="Liberation Mono" fo:font-size="8pt" officeooo:rsid="02120095" style:font-size-asian="8pt" style:font-size-complex="8pt"/>
    </style:style>
    <style:style style:name="T55" style:family="text">
      <style:text-properties fo:font-style="normal" officeooo:rsid="00252d45" style:font-style-asian="normal" style:font-style-complex="normal"/>
    </style:style>
    <style:style style:name="T56" style:family="text">
      <style:text-properties fo:font-style="normal" officeooo:rsid="0235b69a" style:font-style-asian="normal" style:font-style-complex="normal"/>
    </style:style>
    <style:style style:name="T57" style:family="text">
      <style:text-properties officeooo:rsid="01e27265"/>
    </style:style>
    <style:style style:name="T58" style:family="text">
      <style:text-properties officeooo:rsid="009bd77c"/>
    </style:style>
    <style:style style:name="T59" style:family="text">
      <style:text-properties officeooo:rsid="01e322de"/>
    </style:style>
    <style:style style:name="T60" style:family="text">
      <style:text-properties officeooo:rsid="0262fbed"/>
    </style:style>
    <style:style style:name="T61" style:family="text">
      <style:text-properties officeooo:rsid="01e413fc"/>
    </style:style>
    <style:style style:name="T62" style:family="text">
      <style:text-properties style:font-name="Liberation Mono" fo:font-size="8pt" style:font-size-asian="8pt" style:font-size-complex="8pt"/>
    </style:style>
    <style:style style:name="T63" style:family="text">
      <style:text-properties officeooo:rsid="00384b30"/>
    </style:style>
    <style:style style:name="T64" style:family="text">
      <style:text-properties officeooo:rsid="0038bc22"/>
    </style:style>
    <style:style style:name="T65" style:family="text">
      <style:text-properties officeooo:rsid="0235b69a"/>
    </style:style>
    <style:style style:name="T66" style:family="text">
      <style:text-properties officeooo:rsid="024d79a8"/>
    </style:style>
    <style:style style:name="T67" style:family="text">
      <style:text-properties officeooo:rsid="024e61a1"/>
    </style:style>
    <style:style style:name="T68" style:family="text">
      <style:text-properties officeooo:rsid="02362995"/>
    </style:style>
    <style:style style:name="T69" style:family="text">
      <style:text-properties officeooo:rsid="0264b283"/>
    </style:style>
    <style:style style:name="T70" style:family="text">
      <style:text-properties officeooo:rsid="02663662"/>
    </style:style>
    <style:style style:name="T71" style:family="text">
      <style:text-properties officeooo:rsid="0264f8d9"/>
    </style:style>
    <style:style style:name="T72" style:family="text">
      <style:text-properties officeooo:rsid="0266a116"/>
    </style:style>
    <style:style style:name="T73" style:family="text">
      <style:text-properties officeooo:rsid="025021fe"/>
    </style:style>
    <style:style style:name="T74" style:family="text">
      <style:text-properties officeooo:rsid="023ca9af"/>
    </style:style>
    <style:style style:name="T75" style:family="text">
      <style:text-properties officeooo:rsid="023b07bf"/>
    </style:style>
    <style:style style:name="T76" style:family="text">
      <style:text-properties officeooo:rsid="023a57dc"/>
    </style:style>
    <style:style style:name="T77" style:family="text">
      <style:text-properties officeooo:rsid="023832a8"/>
    </style:style>
    <style:style style:name="T78" style:family="text">
      <style:text-properties officeooo:rsid="007d2482"/>
    </style:style>
    <style:style style:name="T79" style:family="text">
      <style:text-properties officeooo:rsid="021741b6"/>
    </style:style>
    <style:style style:name="T80" style:family="text">
      <style:text-properties officeooo:rsid="0223a808"/>
    </style:style>
    <style:style style:name="T81" style:family="text">
      <style:text-properties officeooo:rsid="00c761bb"/>
    </style:style>
    <style:style style:name="T82" style:family="text">
      <style:text-properties officeooo:rsid="00c88faf"/>
    </style:style>
    <style:style style:name="T83" style:family="text">
      <style:text-properties officeooo:rsid="009be66d"/>
    </style:style>
    <style:style style:name="T84" style:family="text">
      <style:text-properties officeooo:rsid="007c87df"/>
    </style:style>
    <style:style style:name="T85" style:family="text">
      <style:text-properties officeooo:rsid="01e4f05d"/>
    </style:style>
    <style:style style:name="T86" style:family="text">
      <style:text-properties officeooo:rsid="0250db29"/>
    </style:style>
    <style:style style:name="T87" style:family="text">
      <style:text-properties fo:font-style="italic" officeooo:rsid="002ab690" style:font-style-asian="italic" style:font-style-complex="italic"/>
    </style:style>
    <style:style style:name="T88" style:family="text">
      <style:text-properties fo:font-style="italic" officeooo:rsid="00801a47" style:font-style-asian="italic" style:font-style-complex="italic"/>
    </style:style>
    <style:style style:name="T89" style:family="text">
      <style:text-properties fo:font-style="italic" officeooo:rsid="0080f33e" style:font-style-asian="italic" style:font-style-complex="italic"/>
    </style:style>
    <style:style style:name="T90" style:family="text">
      <style:text-properties fo:font-style="italic" officeooo:rsid="001ae48a" style:font-style-asian="italic" style:font-style-complex="italic"/>
    </style:style>
    <style:style style:name="T91" style:family="text">
      <style:text-properties officeooo:rsid="02186040"/>
    </style:style>
    <style:style style:name="T92" style:family="text">
      <style:text-properties officeooo:rsid="0043125b"/>
    </style:style>
    <style:style style:name="T93" style:family="text">
      <style:text-properties officeooo:rsid="0063383b"/>
    </style:style>
    <style:style style:name="T94" style:family="text">
      <style:text-properties officeooo:rsid="00440dca"/>
    </style:style>
    <style:style style:name="T95" style:family="text">
      <style:text-properties officeooo:rsid="002de748"/>
    </style:style>
    <style:style style:name="T96" style:family="text">
      <style:text-properties officeooo:rsid="01862e9d"/>
    </style:style>
    <style:style style:name="T97" style:family="text">
      <style:text-properties officeooo:rsid="01a8562e"/>
    </style:style>
    <style:style style:name="T98" style:family="text">
      <style:text-properties officeooo:rsid="0251afc0"/>
    </style:style>
    <style:style style:name="T99" style:family="text">
      <style:text-properties officeooo:rsid="01a73e5e"/>
    </style:style>
    <style:style style:name="T100" style:family="text">
      <style:text-properties officeooo:rsid="0040835f"/>
    </style:style>
    <style:style style:name="T101" style:family="text">
      <style:text-properties officeooo:rsid="002fdc82"/>
    </style:style>
    <style:style style:name="T102" style:family="text">
      <style:text-properties officeooo:rsid="003064f4"/>
    </style:style>
    <style:style style:name="T103" style:family="text">
      <style:text-properties officeooo:rsid="009c7b1f"/>
    </style:style>
    <style:style style:name="T104" style:family="text">
      <style:text-properties officeooo:rsid="008c01e2"/>
    </style:style>
    <style:style style:name="T105" style:family="text">
      <style:text-properties officeooo:rsid="008b2464"/>
    </style:style>
    <style:style style:name="T106" style:family="text">
      <style:text-properties officeooo:rsid="0030713d"/>
    </style:style>
    <style:style style:name="T107" style:family="text">
      <style:text-properties officeooo:rsid="0267b8b1"/>
    </style:style>
    <style:style style:name="T108" style:family="text">
      <style:text-properties officeooo:rsid="008c0d31"/>
    </style:style>
    <style:style style:name="T109" style:family="text">
      <style:text-properties officeooo:rsid="009d7091"/>
    </style:style>
    <style:style style:name="T110" style:family="text">
      <style:text-properties officeooo:rsid="0044daee"/>
    </style:style>
    <style:style style:name="T111" style:family="text">
      <style:text-properties officeooo:rsid="01aaf8a8"/>
    </style:style>
    <style:style style:name="T112" style:family="text">
      <style:text-properties officeooo:rsid="002c742d"/>
    </style:style>
    <style:style style:name="T113" style:family="text">
      <style:text-properties officeooo:rsid="02697360"/>
    </style:style>
    <style:style style:name="T114" style:family="text">
      <style:text-properties officeooo:rsid="00340a37"/>
    </style:style>
    <style:style style:name="T115" style:family="text">
      <style:text-properties officeooo:rsid="00425da3"/>
    </style:style>
    <style:style style:name="T116" style:family="text">
      <style:text-properties officeooo:rsid="0030cdfa"/>
    </style:style>
    <style:style style:name="T117" style:family="text">
      <style:text-properties officeooo:rsid="00330b2e"/>
    </style:style>
    <style:style style:name="T118" style:family="text">
      <style:text-properties officeooo:rsid="0066e108"/>
    </style:style>
    <style:style style:name="T119" style:family="text">
      <style:text-properties officeooo:rsid="01abc6f0"/>
    </style:style>
    <style:style style:name="T120" style:family="text">
      <style:text-properties officeooo:rsid="026b0dd5"/>
    </style:style>
    <style:style style:name="T121" style:family="text">
      <style:text-properties officeooo:rsid="0046245a"/>
    </style:style>
    <style:style style:name="T122" style:family="text">
      <style:text-properties officeooo:rsid="00470b7d"/>
    </style:style>
    <style:style style:name="T123" style:family="text">
      <style:text-properties officeooo:rsid="026ce299"/>
    </style:style>
    <style:style style:name="T124" style:family="text">
      <style:text-properties officeooo:rsid="0018e84b"/>
    </style:style>
    <style:style style:name="T125" style:family="text">
      <style:text-properties officeooo:rsid="001ae48a"/>
    </style:style>
    <style:style style:name="T126" style:family="text">
      <style:text-properties officeooo:rsid="003b0966"/>
    </style:style>
    <style:style style:name="T127" style:family="text">
      <style:text-properties officeooo:rsid="0104fe34"/>
    </style:style>
    <style:style style:name="T128" style:family="text">
      <style:text-properties officeooo:rsid="00895262"/>
    </style:style>
    <style:style style:name="T129" style:family="text">
      <style:text-properties officeooo:rsid="00689d61"/>
    </style:style>
    <style:style style:name="T130" style:family="text">
      <style:text-properties officeooo:rsid="00472e6a"/>
    </style:style>
    <style:style style:name="T131" style:family="text">
      <style:text-properties officeooo:rsid="026ea582"/>
    </style:style>
    <style:style style:name="T132" style:family="text">
      <style:text-properties officeooo:rsid="004cff02"/>
    </style:style>
    <style:style style:name="T133" style:family="text">
      <style:text-properties officeooo:rsid="0270862d"/>
    </style:style>
    <style:style style:name="T134" style:family="text">
      <style:text-properties officeooo:rsid="004d785d"/>
    </style:style>
    <style:style style:name="T135" style:family="text">
      <style:text-properties officeooo:rsid="0048920c"/>
    </style:style>
    <style:style style:name="T136" style:family="text">
      <style:text-properties officeooo:rsid="0049d0d6"/>
    </style:style>
    <style:style style:name="T137" style:family="text">
      <style:text-properties officeooo:rsid="004920a7"/>
    </style:style>
    <style:style style:name="T138" style:family="text">
      <style:text-properties officeooo:rsid="006a0e32"/>
    </style:style>
    <style:style style:name="T139" style:family="text">
      <style:text-properties officeooo:rsid="005043e0"/>
    </style:style>
    <style:style style:name="T140" style:family="text">
      <style:text-properties officeooo:rsid="0271d99a"/>
    </style:style>
    <style:style style:name="T141" style:family="text">
      <style:text-properties officeooo:rsid="005123fa"/>
    </style:style>
    <style:style style:name="T142" style:family="text">
      <style:text-properties officeooo:rsid="00521246"/>
    </style:style>
    <style:style style:name="T143" style:family="text">
      <style:text-properties officeooo:rsid="00d3113d"/>
    </style:style>
    <style:style style:name="T144" style:family="text">
      <style:text-properties officeooo:rsid="0055c42a"/>
    </style:style>
    <style:style style:name="T145" style:family="text">
      <style:text-properties officeooo:rsid="0057ded2"/>
    </style:style>
    <style:style style:name="T146" style:family="text">
      <style:text-properties officeooo:rsid="006b55e5"/>
    </style:style>
    <style:style style:name="T147" style:family="text">
      <style:text-properties officeooo:rsid="006b7b87"/>
    </style:style>
    <style:style style:name="T148" style:family="text">
      <style:text-properties officeooo:rsid="0076a679"/>
    </style:style>
    <style:style style:name="T149" style:family="text">
      <style:text-properties officeooo:rsid="0075afc1"/>
    </style:style>
    <style:style style:name="T150" style:family="text">
      <style:text-properties officeooo:rsid="00d4f7c4"/>
    </style:style>
    <style:style style:name="T151" style:family="text">
      <style:text-properties officeooo:rsid="00d5bcc1"/>
    </style:style>
    <style:style style:name="T152" style:family="text">
      <style:text-properties officeooo:rsid="0058c08f"/>
    </style:style>
    <style:style style:name="T153" style:family="text">
      <style:text-properties officeooo:rsid="00598d61"/>
    </style:style>
    <style:style style:name="T154" style:family="text">
      <style:text-properties officeooo:rsid="0059d97e"/>
    </style:style>
    <style:style style:name="T155" style:family="text">
      <style:text-properties officeooo:rsid="005b14c1"/>
    </style:style>
    <style:style style:name="T156" style:family="text">
      <style:text-properties officeooo:rsid="01e6537a"/>
    </style:style>
    <style:style style:name="T157" style:family="text">
      <style:text-properties officeooo:rsid="02749318"/>
    </style:style>
    <style:style style:name="T158" style:family="text">
      <style:text-properties officeooo:rsid="02754da0"/>
    </style:style>
    <style:style style:name="T159" style:family="text">
      <style:text-properties officeooo:rsid="01e81189"/>
    </style:style>
    <style:style style:name="T160" style:family="text">
      <style:text-properties fo:font-style="normal" officeooo:rsid="001ae48a" style:font-style-asian="normal" style:font-style-complex="normal"/>
    </style:style>
    <style:style style:name="T161" style:family="text">
      <style:text-properties officeooo:rsid="02195467"/>
    </style:style>
    <style:style style:name="T162" style:family="text">
      <style:text-properties officeooo:rsid="001afac3"/>
    </style:style>
    <style:style style:name="T163" style:family="text">
      <style:text-properties fo:font-style="italic" officeooo:rsid="001afac3" style:font-style-asian="italic" style:font-style-complex="italic"/>
    </style:style>
    <style:style style:name="T164" style:family="text">
      <style:text-properties officeooo:rsid="01e8fec5"/>
    </style:style>
    <style:style style:name="T165" style:family="text">
      <style:text-properties officeooo:rsid="008249da"/>
    </style:style>
    <style:style style:name="T166" style:family="text">
      <style:text-properties officeooo:rsid="006da221"/>
    </style:style>
    <style:style style:name="T167" style:family="text">
      <style:text-properties officeooo:rsid="00781ad0"/>
    </style:style>
    <style:style style:name="T168" style:family="text">
      <style:text-properties officeooo:rsid="0083e02f"/>
    </style:style>
    <style:style style:name="T169" style:family="text">
      <style:text-properties officeooo:rsid="007879a4"/>
    </style:style>
    <style:style style:name="T170" style:family="text">
      <style:text-properties officeooo:rsid="007a54cc"/>
    </style:style>
    <style:style style:name="T171" style:family="text">
      <style:text-properties fo:font-style="italic" officeooo:rsid="006da221" style:font-style-asian="italic" style:font-style-complex="italic"/>
    </style:style>
    <style:style style:name="T172" style:family="text">
      <style:text-properties officeooo:rsid="008e3bc3"/>
    </style:style>
    <style:style style:name="T173" style:family="text">
      <style:text-properties officeooo:rsid="008cb387"/>
    </style:style>
    <style:style style:name="T174" style:family="text">
      <style:text-properties officeooo:rsid="008ff732"/>
    </style:style>
    <style:style style:name="T175" style:family="text">
      <style:text-properties officeooo:rsid="027708b4"/>
    </style:style>
    <style:style style:name="T176" style:family="text">
      <style:text-properties officeooo:rsid="00861a4a"/>
    </style:style>
    <style:style style:name="T177" style:family="text">
      <style:text-properties officeooo:rsid="0277d99e"/>
    </style:style>
    <style:style style:name="T178" style:family="text">
      <style:text-properties officeooo:rsid="0279a1c6"/>
    </style:style>
    <style:style style:name="T179" style:family="text">
      <style:text-properties officeooo:rsid="027b40e7"/>
    </style:style>
    <style:style style:name="T180" style:family="text">
      <style:text-properties officeooo:rsid="00875eb4"/>
    </style:style>
    <style:style style:name="T181" style:family="text">
      <style:text-properties officeooo:rsid="00877b96"/>
    </style:style>
    <style:style style:name="T182" style:family="text">
      <style:text-properties officeooo:rsid="005fefb5"/>
    </style:style>
    <style:style style:name="T183" style:family="text">
      <style:text-properties officeooo:rsid="006fc816"/>
    </style:style>
    <style:style style:name="T184" style:family="text">
      <style:text-properties officeooo:rsid="00877f6a"/>
    </style:style>
    <style:style style:name="T185" style:family="text">
      <style:text-properties officeooo:rsid="00a40785"/>
    </style:style>
    <style:style style:name="T186" style:family="text">
      <style:text-properties officeooo:rsid="00a31374"/>
    </style:style>
    <style:style style:name="T187" style:family="text">
      <style:text-properties officeooo:rsid="00a11a61"/>
    </style:style>
    <style:style style:name="T188" style:family="text">
      <style:text-properties officeooo:rsid="007b2be4"/>
    </style:style>
    <style:style style:name="T189" style:family="text">
      <style:text-properties officeooo:rsid="01ec7ba0"/>
    </style:style>
    <style:style style:name="T190" style:family="text">
      <style:text-properties officeooo:rsid="01eaae02"/>
    </style:style>
    <style:style style:name="T191" style:family="text">
      <style:text-properties officeooo:rsid="00d703f2"/>
    </style:style>
    <style:style style:name="T192" style:family="text">
      <style:text-properties officeooo:rsid="01ecd149"/>
    </style:style>
    <style:style style:name="T193" style:family="text">
      <style:text-properties officeooo:rsid="01edc9a0"/>
    </style:style>
    <style:style style:name="T194" style:family="text">
      <style:text-properties officeooo:rsid="00f4a9b4"/>
    </style:style>
    <style:style style:name="T195" style:family="text">
      <style:text-properties officeooo:rsid="027d1a12"/>
    </style:style>
    <style:style style:name="T196" style:family="text">
      <style:text-properties officeooo:rsid="00d71899"/>
    </style:style>
    <style:style style:name="T197" style:family="text">
      <style:text-properties officeooo:rsid="021e09fa"/>
    </style:style>
    <style:style style:name="T198" style:family="text">
      <style:text-properties officeooo:rsid="00a5f1a9"/>
    </style:style>
    <style:style style:name="T199" style:family="text">
      <style:text-properties officeooo:rsid="00da4038"/>
    </style:style>
    <style:style style:name="T200" style:family="text">
      <style:text-properties officeooo:rsid="00950a73"/>
    </style:style>
    <style:style style:name="T201" style:family="text">
      <style:text-properties officeooo:rsid="00dc19f0"/>
    </style:style>
    <style:style style:name="T202" style:family="text">
      <style:text-properties fo:font-weight="bold" style:font-weight-asian="bold" style:font-weight-complex="bold"/>
    </style:style>
    <style:style style:name="T203" style:family="text">
      <style:text-properties officeooo:rsid="0095d848"/>
    </style:style>
    <style:style style:name="T204" style:family="text">
      <style:text-properties officeooo:rsid="01f0c4d8"/>
    </style:style>
    <style:style style:name="T205" style:family="text">
      <style:text-properties officeooo:rsid="006f1bd3"/>
    </style:style>
    <style:style style:name="T206" style:family="text">
      <style:text-properties officeooo:rsid="0095fb65"/>
    </style:style>
    <style:style style:name="T207" style:family="text">
      <style:text-properties officeooo:rsid="009a0e2a"/>
    </style:style>
    <style:style style:name="T208" style:family="text">
      <style:text-properties officeooo:rsid="006de4e2"/>
    </style:style>
    <style:style style:name="T209" style:family="text">
      <style:text-properties officeooo:rsid="01f178c0"/>
    </style:style>
    <style:style style:name="T210" style:family="text">
      <style:text-properties officeooo:rsid="00c9d071"/>
    </style:style>
    <style:style style:name="T211" style:family="text">
      <style:text-properties officeooo:rsid="014fbf04"/>
    </style:style>
    <style:style style:name="T212" style:family="text">
      <style:text-properties officeooo:rsid="013cc9d6"/>
    </style:style>
    <style:style style:name="T213" style:family="text">
      <style:text-properties officeooo:rsid="027e379b"/>
    </style:style>
    <style:style style:name="T214" style:family="text">
      <style:text-properties officeooo:rsid="027ee463"/>
    </style:style>
    <style:style style:name="T215" style:family="text">
      <style:text-properties officeooo:rsid="028189d4"/>
    </style:style>
    <style:style style:name="T216" style:family="text">
      <style:text-properties officeooo:rsid="0280660f"/>
    </style:style>
    <style:style style:name="T217" style:family="text">
      <style:text-properties officeooo:rsid="01f17ba7"/>
    </style:style>
    <style:style style:name="T218" style:family="text">
      <style:text-properties officeooo:rsid="01506eea"/>
    </style:style>
    <style:style style:name="T219" style:family="text">
      <style:text-properties officeooo:rsid="00ad0743"/>
    </style:style>
    <style:style style:name="T220" style:family="text">
      <style:text-properties officeooo:rsid="0256a4c6"/>
    </style:style>
    <style:style style:name="T221" style:family="text">
      <style:text-properties officeooo:rsid="01526adb"/>
    </style:style>
    <style:style style:name="T222" style:family="text">
      <style:text-properties officeooo:rsid="00cb3cb8"/>
    </style:style>
    <style:style style:name="T223" style:family="text">
      <style:text-properties officeooo:rsid="00ad7d7b"/>
    </style:style>
    <style:style style:name="T224" style:family="text">
      <style:text-properties officeooo:rsid="00ae5a8b"/>
    </style:style>
    <style:style style:name="T225" style:family="text">
      <style:text-properties officeooo:rsid="01f24696"/>
    </style:style>
    <style:style style:name="T226" style:family="text">
      <style:text-properties officeooo:rsid="01f2e5a8"/>
    </style:style>
    <style:style style:name="T227" style:family="text">
      <style:text-properties officeooo:rsid="02571d10"/>
    </style:style>
    <style:style style:name="T228" style:family="text">
      <style:text-properties officeooo:rsid="02582b82"/>
    </style:style>
    <style:style style:name="T229" style:family="text">
      <style:text-properties officeooo:rsid="0259875e"/>
    </style:style>
    <style:style style:name="T230" style:family="text">
      <style:text-properties officeooo:rsid="025abdd6"/>
    </style:style>
    <style:style style:name="T231" style:family="text">
      <style:text-properties officeooo:rsid="00b0e6a0"/>
    </style:style>
    <style:style style:name="T232" style:family="text">
      <style:text-properties officeooo:rsid="01f4bfbc"/>
    </style:style>
    <style:style style:name="T233" style:family="text">
      <style:text-properties officeooo:rsid="00b095a1"/>
    </style:style>
    <style:style style:name="T234" style:family="text">
      <style:text-properties officeooo:rsid="00b0c9d5"/>
    </style:style>
    <style:style style:name="T235" style:family="text">
      <style:text-properties officeooo:rsid="00dde8c6"/>
    </style:style>
    <style:style style:name="T236" style:family="text">
      <style:text-properties style:rfc-language-tag="az-Latn-AZ" fo:language="az" fo:script="Latn" fo:country="AZ" fo:font-style="italic"/>
    </style:style>
    <style:style style:name="T237" style:family="text">
      <style:text-properties style:rfc-language-tag="az-Latn-AZ" fo:language="az" fo:script="Latn" fo:country="AZ" fo:font-style="normal" officeooo:rsid="0018e84b" style:font-style-asian="normal" style:font-style-complex="normal"/>
    </style:style>
    <style:style style:name="T238" style:family="text">
      <style:text-properties officeooo:rsid="0229ee61"/>
    </style:style>
    <style:style style:name="T239" style:family="text">
      <style:text-properties officeooo:rsid="022b14ff"/>
    </style:style>
    <style:style style:name="T240" style:family="text">
      <style:text-properties officeooo:rsid="01542ced"/>
    </style:style>
    <style:style style:name="T241" style:family="text">
      <style:text-properties fo:font-size="10pt" fo:language="en" fo:country="US"/>
    </style:style>
    <style:style style:name="T242" style:family="text">
      <style:text-properties fo:font-size="10pt" fo:language="en" fo:country="US" officeooo:rsid="022d6e7a"/>
    </style:style>
    <style:style style:name="T243" style:family="text">
      <style:text-properties fo:font-size="10pt" fo:language="en" fo:country="US" officeooo:rsid="025c095b"/>
    </style:style>
    <style:style style:name="T244" style:family="text">
      <style:text-properties fo:font-size="10pt" fo:language="en" fo:country="US" officeooo:rsid="025beaa0"/>
    </style:style>
    <style:style style:name="T245" style:family="text">
      <style:text-properties fo:font-size="10pt" fo:language="en" fo:country="US" officeooo:rsid="00dfcc9d"/>
    </style:style>
    <style:style style:name="T246" style:family="text">
      <style:text-properties fo:font-size="10pt" fo:language="en" fo:country="US" officeooo:rsid="01f82acf"/>
    </style:style>
    <style:style style:name="T247" style:family="text">
      <style:text-properties fo:font-size="10pt" fo:language="en" fo:country="US" officeooo:rsid="025c47af"/>
    </style:style>
    <style:style style:name="T248" style:family="text">
      <style:text-properties fo:font-size="10pt" fo:language="en" fo:country="US" officeooo:rsid="022f358e"/>
    </style:style>
    <style:style style:name="T249" style:family="text">
      <style:text-properties fo:font-size="10pt" fo:language="en" fo:country="US" officeooo:rsid="00b2d66e"/>
    </style:style>
    <style:style style:name="T250" style:family="text">
      <style:text-properties fo:font-size="10pt" fo:language="en" fo:country="US" officeooo:rsid="01fa1be6"/>
    </style:style>
    <style:style style:name="T251" style:family="text">
      <style:text-properties fo:font-size="10pt" fo:language="en" fo:country="US" officeooo:rsid="00b5e943"/>
    </style:style>
    <style:style style:name="T252" style:family="text">
      <style:text-properties fo:font-size="10pt" fo:language="en" fo:country="US" officeooo:rsid="02314d2f"/>
    </style:style>
    <style:style style:name="T253" style:family="text">
      <style:text-properties fo:font-size="10pt" fo:language="en" fo:country="US" officeooo:rsid="00e004e0"/>
    </style:style>
    <style:style style:name="T254" style:family="text">
      <style:text-properties fo:font-size="10pt" fo:language="en" fo:country="US" officeooo:rsid="02980566"/>
    </style:style>
    <style:style style:name="T255" style:family="text">
      <style:text-properties fo:font-size="10pt" fo:language="en" fo:country="US" officeooo:rsid="00cd820c"/>
    </style:style>
    <style:style style:name="T256" style:family="text">
      <style:text-properties fo:font-size="10pt" fo:language="en" fo:country="US" officeooo:rsid="00cbbbb0"/>
    </style:style>
    <style:style style:name="T257" style:family="text">
      <style:text-properties fo:font-size="10pt" fo:language="en" fo:country="US" officeooo:rsid="02826699"/>
    </style:style>
    <style:style style:name="T258" style:family="text">
      <style:text-properties fo:font-size="10pt" fo:language="en" fo:country="US" officeooo:rsid="00b5bd19"/>
    </style:style>
    <style:style style:name="T259" style:family="text">
      <style:text-properties officeooo:rsid="00b9e023"/>
    </style:style>
    <style:style style:name="T260" style:family="text">
      <style:text-properties officeooo:rsid="013ba8aa"/>
    </style:style>
    <style:style style:name="T261" style:family="text">
      <style:text-properties officeooo:rsid="01fc110d"/>
    </style:style>
    <style:style style:name="T262" style:family="text">
      <style:text-properties officeooo:rsid="0202b5fc"/>
    </style:style>
    <style:style style:name="T263" style:family="text">
      <style:text-properties officeooo:rsid="00c2d10a"/>
    </style:style>
    <style:style style:name="T264" style:family="text">
      <style:text-properties officeooo:rsid="00c3c2b1"/>
    </style:style>
    <style:style style:name="T265" style:family="text">
      <style:text-properties officeooo:rsid="013e09ae"/>
    </style:style>
    <style:style style:name="T266" style:family="text">
      <style:text-properties officeooo:rsid="01ff87a4"/>
    </style:style>
    <style:style style:name="T267" style:family="text">
      <style:text-properties officeooo:rsid="00b7e6d5"/>
    </style:style>
    <style:style style:name="T268" style:family="text">
      <style:text-properties officeooo:rsid="01fd9298"/>
    </style:style>
    <style:style style:name="T269" style:family="text">
      <style:text-properties officeooo:rsid="015930c4"/>
    </style:style>
    <style:style style:name="T270" style:family="text">
      <style:text-properties officeooo:rsid="00bf98a2"/>
    </style:style>
    <style:style style:name="T271" style:family="text">
      <style:text-properties officeooo:rsid="00b903a7"/>
    </style:style>
    <style:style style:name="T272" style:family="text">
      <style:text-properties officeooo:rsid="01ff29cd"/>
    </style:style>
    <style:style style:name="T273" style:family="text">
      <style:text-properties officeooo:rsid="00c3ec34"/>
    </style:style>
    <style:style style:name="T274" style:family="text">
      <style:text-properties officeooo:rsid="00c5b717"/>
    </style:style>
    <style:style style:name="T275" style:family="text">
      <style:text-properties officeooo:rsid="0156c5fc"/>
    </style:style>
    <style:style style:name="T276" style:family="text">
      <style:text-properties officeooo:rsid="00bc365a"/>
    </style:style>
    <style:style style:name="T277" style:family="text">
      <style:text-properties officeooo:rsid="01fc9c5c"/>
    </style:style>
    <style:style style:name="T278" style:family="text">
      <style:text-properties officeooo:rsid="01585191"/>
    </style:style>
    <style:style style:name="T279" style:family="text">
      <style:text-properties officeooo:rsid="00cf643d"/>
    </style:style>
    <style:style style:name="T280" style:family="text">
      <style:text-properties officeooo:rsid="00bdae01"/>
    </style:style>
    <style:style style:name="T281" style:family="text">
      <style:text-properties officeooo:rsid="0203168a"/>
    </style:style>
    <style:style style:name="T282" style:family="text">
      <style:text-properties officeooo:rsid="0160dc6b"/>
    </style:style>
    <style:style style:name="T283" style:family="text">
      <style:text-properties officeooo:rsid="00ef125c"/>
    </style:style>
    <style:style style:name="T284" style:family="text">
      <style:text-properties officeooo:rsid="00f8cad1"/>
    </style:style>
    <style:style style:name="T285" style:family="text">
      <style:text-properties fo:font-weight="bold" officeooo:rsid="00f00105" style:font-weight-asian="bold" style:font-weight-complex="bold"/>
    </style:style>
    <style:style style:name="T286" style:family="text">
      <style:text-properties officeooo:rsid="00ec85b2"/>
    </style:style>
    <style:style style:name="T287" style:family="text">
      <style:text-properties fo:font-style="italic" officeooo:rsid="00ec85b2" style:font-style-asian="italic" style:font-style-complex="italic"/>
    </style:style>
    <style:style style:name="T288" style:family="text">
      <style:text-properties fo:font-style="italic" officeooo:rsid="00ef125c" style:font-style-asian="italic" style:font-style-complex="italic"/>
    </style:style>
    <style:style style:name="T289" style:family="text">
      <style:text-properties fo:font-style="normal" officeooo:rsid="00f8cad1" style:font-style-asian="normal" style:font-style-complex="normal"/>
    </style:style>
    <style:style style:name="T290" style:family="text">
      <style:text-properties officeooo:rsid="01231b5f"/>
    </style:style>
    <style:style style:name="T291" style:family="text">
      <style:text-properties officeooo:rsid="0124e2a0"/>
    </style:style>
    <style:style style:name="T292" style:family="text">
      <style:text-properties officeooo:rsid="00ee9bbc"/>
    </style:style>
    <style:style style:name="T293" style:family="text">
      <style:text-properties officeooo:rsid="00f98a2e"/>
    </style:style>
    <style:style style:name="T294" style:family="text">
      <style:text-properties fo:font-style="normal" officeooo:rsid="00ee9bbc" style:font-style-asian="normal" style:font-style-complex="normal"/>
    </style:style>
    <style:style style:name="T295" style:family="text">
      <style:text-properties fo:font-style="normal" officeooo:rsid="00ef125c" style:font-style-asian="normal" style:font-style-complex="normal"/>
    </style:style>
    <style:style style:name="T296" style:family="text">
      <style:text-properties officeooo:rsid="00fa8126"/>
    </style:style>
    <style:style style:name="T297" style:family="text">
      <style:text-properties officeooo:rsid="01628c0d"/>
    </style:style>
    <style:style style:name="T298" style:family="text">
      <style:text-properties officeooo:rsid="00f32346"/>
    </style:style>
    <style:style style:name="T299" style:family="text">
      <style:text-properties officeooo:rsid="00fb869e"/>
    </style:style>
    <style:style style:name="T300" style:family="text">
      <style:text-properties officeooo:rsid="0127bb1f"/>
    </style:style>
    <style:style style:name="T301" style:family="text">
      <style:text-properties officeooo:rsid="0126312c"/>
    </style:style>
    <style:style style:name="T302" style:family="text">
      <style:text-properties officeooo:rsid="012798b6"/>
    </style:style>
    <style:style style:name="T303" style:family="text">
      <style:text-properties officeooo:rsid="0163e697"/>
    </style:style>
    <style:style style:name="T304" style:family="text">
      <style:text-properties fo:font-style="normal" fo:font-weight="bold" style:font-style-asian="normal" style:font-weight-asian="bold" style:font-style-complex="normal" style:font-weight-complex="bold"/>
    </style:style>
    <style:style style:name="T305" style:family="text">
      <style:text-properties fo:font-style="normal" style:font-style-asian="normal" style:font-style-complex="normal"/>
    </style:style>
    <style:style style:name="T306" style:family="text">
      <style:text-properties fo:font-style="normal" officeooo:rsid="00fbec11" style:font-style-asian="normal" style:font-style-complex="normal"/>
    </style:style>
    <style:style style:name="T307" style:family="text">
      <style:text-properties fo:font-style="normal" officeooo:rsid="012846b2" style:font-style-asian="normal" style:font-style-complex="normal"/>
    </style:style>
    <style:style style:name="T308" style:family="text">
      <style:text-properties fo:font-style="normal" officeooo:rsid="0129898d" style:font-style-asian="normal" style:font-style-complex="normal"/>
    </style:style>
    <style:style style:name="T309" style:family="text">
      <style:text-properties fo:font-style="normal" officeooo:rsid="0127ea15" style:font-style-asian="normal" style:font-style-complex="normal"/>
    </style:style>
    <style:style style:name="T310" style:family="text">
      <style:text-properties fo:font-style="normal" officeooo:rsid="00fdd6fa" style:font-style-asian="normal" style:font-style-complex="normal"/>
    </style:style>
    <style:style style:name="T311" style:family="text">
      <style:text-properties fo:font-style="normal" officeooo:rsid="00fb869e" style:font-style-asian="normal" style:font-style-complex="normal"/>
    </style:style>
    <style:style style:name="T312" style:family="text">
      <style:text-properties fo:font-style="normal" officeooo:rsid="00fe41a4" style:font-style-asian="normal" style:font-style-complex="normal"/>
    </style:style>
    <style:style style:name="T313" style:family="text">
      <style:text-properties fo:font-style="normal" officeooo:rsid="012acb6d" style:font-style-asian="normal" style:font-style-complex="normal"/>
    </style:style>
    <style:style style:name="T314" style:family="text">
      <style:text-properties fo:font-style="normal" officeooo:rsid="0102ef23" style:font-style-asian="normal" style:font-style-complex="normal"/>
    </style:style>
    <style:style style:name="T315" style:family="text">
      <style:text-properties officeooo:rsid="0287d144"/>
    </style:style>
    <style:style style:name="T316" style:family="text">
      <style:text-properties officeooo:rsid="028d0a31"/>
    </style:style>
    <style:style style:name="T317" style:family="text">
      <style:text-properties officeooo:rsid="029629c2"/>
    </style:style>
    <style:style style:name="T318" style:family="text">
      <style:text-properties officeooo:rsid="028b9197"/>
    </style:style>
    <style:style style:name="T319" style:family="text">
      <style:text-properties officeooo:rsid="028d4d63"/>
    </style:style>
    <style:style style:name="T320" style:family="text">
      <style:text-properties fo:font-style="normal" officeooo:rsid="028770e2" style:font-style-asian="normal" style:font-style-complex="normal"/>
    </style:style>
    <style:style style:name="T321" style:family="text">
      <style:text-properties fo:font-style="normal" officeooo:rsid="01862e9d" style:font-style-asian="normal" style:font-style-complex="normal"/>
    </style:style>
    <style:style style:name="T322" style:family="text">
      <style:text-properties officeooo:rsid="0254b6f8"/>
    </style:style>
    <style:style style:name="T323" style:family="text">
      <style:text-properties fo:font-style="normal" officeooo:rsid="0286ccae" style:font-style-asian="normal" style:font-style-complex="normal"/>
    </style:style>
    <style:style style:name="T324" style:family="text">
      <style:text-properties fo:font-style="normal" officeooo:rsid="028d4d63" style:font-style-asian="normal" style:font-style-complex="normal"/>
    </style:style>
    <style:style style:name="T325" style:family="text">
      <style:text-properties fo:font-style="normal" officeooo:rsid="0189bcac" style:font-style-asian="normal" style:font-style-complex="normal"/>
    </style:style>
    <style:style style:name="T326" style:family="text">
      <style:text-properties fo:font-style="normal" officeooo:rsid="01a24b88" style:font-style-asian="normal" style:font-style-complex="normal"/>
    </style:style>
    <style:style style:name="T327" style:family="text">
      <style:text-properties fo:font-style="normal" officeooo:rsid="01a2d437" style:font-style-asian="normal" style:font-style-complex="normal"/>
    </style:style>
    <style:style style:name="T328" style:family="text">
      <style:text-properties fo:font-style="normal" officeooo:rsid="0187c869" style:font-style-asian="normal" style:font-style-complex="normal"/>
    </style:style>
    <style:style style:name="T329" style:family="text">
      <style:text-properties fo:font-style="normal" officeooo:rsid="0187450d" style:font-style-asian="normal" style:font-style-complex="normal"/>
    </style:style>
    <style:style style:name="T330" style:family="text">
      <style:text-properties fo:font-style="normal" officeooo:rsid="01a3d624" style:font-style-asian="normal" style:font-style-complex="normal"/>
    </style:style>
    <style:style style:name="T331" style:family="text">
      <style:text-properties fo:font-style="normal" officeooo:rsid="028b9197" style:font-style-asian="normal" style:font-style-complex="normal"/>
    </style:style>
    <style:style style:name="T332" style:family="text">
      <style:text-properties fo:font-style="normal" officeooo:rsid="029629c2" style:font-style-asian="normal" style:font-style-complex="normal"/>
    </style:style>
    <style:style style:name="T333" style:family="text">
      <style:text-properties officeooo:rsid="0296632d"/>
    </style:style>
    <style:style style:name="T334" style:family="text">
      <style:text-properties officeooo:rsid="028770e2"/>
    </style:style>
    <style:style style:name="T335" style:family="text">
      <style:text-properties fo:font-style="italic" officeooo:rsid="01649062" style:font-style-asian="italic" style:font-style-complex="italic"/>
    </style:style>
    <style:style style:name="T336" style:family="text">
      <style:text-properties officeooo:rsid="01b17365"/>
    </style:style>
    <style:style style:name="T337" style:family="text">
      <style:text-properties officeooo:rsid="013269b7"/>
    </style:style>
    <style:style style:name="T338" style:family="text">
      <style:text-properties officeooo:rsid="01c9e426"/>
    </style:style>
    <style:style style:name="T339" style:family="text">
      <style:text-properties officeooo:rsid="01ce18a2"/>
    </style:style>
    <style:style style:name="T340" style:family="text">
      <style:text-properties officeooo:rsid="01d688f6"/>
    </style:style>
    <style:style style:name="T341" style:family="text">
      <style:text-properties officeooo:rsid="01acbe9c"/>
    </style:style>
    <style:style style:name="T342" style:family="text">
      <style:text-properties fo:font-style="italic" officeooo:rsid="01acbe9c" style:font-style-asian="italic" style:font-style-complex="italic"/>
    </style:style>
    <style:style style:name="T343" style:family="text">
      <style:text-properties officeooo:rsid="01cc929e"/>
    </style:style>
    <style:style style:name="T344" style:family="text">
      <style:text-properties officeooo:rsid="028eef94"/>
    </style:style>
    <style:style style:name="T345" style:family="text">
      <style:text-properties officeooo:rsid="01d29239"/>
    </style:style>
    <style:style style:name="T346" style:family="text">
      <style:text-properties officeooo:rsid="00e4cbe4"/>
    </style:style>
    <style:style style:name="T347" style:family="text">
      <style:text-properties officeooo:rsid="0115abb9"/>
    </style:style>
    <style:style style:name="T348" style:family="text">
      <style:text-properties officeooo:rsid="0114e5f3"/>
    </style:style>
    <style:style style:name="T349" style:family="text">
      <style:text-properties officeooo:rsid="011993aa"/>
    </style:style>
    <style:style style:name="T350" style:family="text">
      <style:text-properties officeooo:rsid="023faceb"/>
    </style:style>
    <style:style style:name="T351" style:family="text">
      <style:text-properties officeooo:rsid="011b2b09"/>
    </style:style>
    <style:style style:name="T352" style:family="text">
      <style:text-properties officeooo:rsid="01b1c2b6"/>
    </style:style>
    <style:style style:name="T353" style:family="text">
      <style:text-properties officeooo:rsid="0247a405"/>
    </style:style>
    <style:style style:name="T354" style:family="text">
      <style:text-properties officeooo:rsid="011dc573"/>
    </style:style>
    <style:style style:name="T355" style:family="text">
      <style:text-properties officeooo:rsid="011e4122"/>
    </style:style>
    <style:style style:name="T356" style:family="text">
      <style:text-properties officeooo:rsid="02073bb0"/>
    </style:style>
    <style:style style:name="T357" style:family="text">
      <style:text-properties officeooo:rsid="01964824"/>
    </style:style>
    <style:style style:name="T358" style:family="text">
      <style:text-properties officeooo:rsid="00e1b81b"/>
    </style:style>
    <style:style style:name="T359" style:family="text">
      <style:text-properties officeooo:rsid="0205490a"/>
    </style:style>
    <style:style style:name="T360" style:family="text">
      <style:text-properties officeooo:rsid="011934cd"/>
    </style:style>
    <style:style style:name="T361" style:family="text">
      <style:text-properties fo:font-style="italic" officeooo:rsid="021e8eb8" style:font-style-asian="italic" style:font-style-complex="italic"/>
    </style:style>
    <style:style style:name="T362" style:family="text">
      <style:text-properties fo:font-style="italic" officeooo:rsid="011934cd" style:font-style-asian="italic" style:font-style-complex="italic"/>
    </style:style>
    <style:style style:name="T363" style:family="text">
      <style:text-properties officeooo:rsid="0248e4c0"/>
    </style:style>
    <style:style style:name="T364" style:family="text">
      <style:text-properties officeooo:rsid="02845f8a"/>
    </style:style>
    <style:style style:name="T365" style:family="text">
      <style:text-properties officeooo:rsid="01c162bc"/>
    </style:style>
    <style:style style:name="T366" style:family="text">
      <style:text-properties officeooo:rsid="024413e6"/>
    </style:style>
    <style:style style:name="T367" style:family="text">
      <style:text-properties officeooo:rsid="0249da63"/>
    </style:style>
    <style:style style:name="T368" style:family="text">
      <style:text-properties officeooo:rsid="02066077"/>
    </style:style>
    <style:style style:name="T369" style:family="text">
      <style:text-properties officeooo:rsid="014c14cf"/>
    </style:style>
    <style:style style:name="T370" style:family="text">
      <style:text-properties officeooo:rsid="01c352c8"/>
    </style:style>
    <style:style style:name="T371" style:family="text">
      <style:text-properties fo:font-size="8pt" style:font-size-asian="8pt" style:font-size-complex="8pt"/>
    </style:style>
    <style:style style:name="T372" style:family="text">
      <style:text-properties officeooo:rsid="01b5dee1"/>
    </style:style>
    <style:style style:name="T373" style:family="text">
      <style:text-properties officeooo:rsid="00e9cde9"/>
    </style:style>
    <style:style style:name="T374" style:family="text">
      <style:text-properties officeooo:rsid="01132dd8"/>
    </style:style>
    <style:style style:name="T375" style:family="text">
      <style:text-properties officeooo:rsid="01ac6652"/>
    </style:style>
    <style:style style:name="T376" style:family="text">
      <style:text-properties officeooo:rsid="00e51c7f"/>
    </style:style>
    <style:style style:name="T377" style:family="text">
      <style:text-properties officeooo:rsid="00e6d8f7"/>
    </style:style>
    <style:style style:name="T378" style:family="text">
      <style:text-properties officeooo:rsid="00e3714d"/>
    </style:style>
    <style:style style:name="T379" style:family="text">
      <style:text-properties officeooo:rsid="010a4e2f"/>
    </style:style>
    <style:style style:name="T380" style:family="text">
      <style:text-properties officeooo:rsid="01064a41"/>
    </style:style>
    <style:style style:name="T381" style:family="text">
      <style:text-properties officeooo:rsid="01068ef5"/>
    </style:style>
    <style:style style:name="T382" style:family="text">
      <style:text-properties fo:font-size="10pt" style:font-size-asian="10pt" style:font-size-complex="10pt"/>
    </style:style>
    <style:style style:name="T383" style:family="text">
      <style:text-properties fo:font-size="10pt" officeooo:rsid="01068ef5" style:font-size-asian="10pt" style:font-size-complex="10pt"/>
    </style:style>
    <style:style style:name="T384" style:family="text">
      <style:text-properties officeooo:rsid="0106b576"/>
    </style:style>
    <style:style style:name="T385" style:family="text">
      <style:text-properties fo:font-size="10pt" officeooo:rsid="0106b576" style:font-size-asian="10pt" style:font-size-complex="10pt"/>
    </style:style>
    <style:style style:name="T386" style:family="text">
      <style:text-properties officeooo:rsid="029426ac"/>
    </style:style>
    <style:style style:name="T387" style:family="text">
      <style:text-properties officeooo:rsid="0145a160"/>
    </style:style>
    <style:style style:name="T388" style:family="text">
      <style:text-properties fo:font-size="10pt" officeooo:rsid="0108c57f" style:font-size-asian="10pt" style:font-size-complex="10pt"/>
    </style:style>
    <style:style style:name="T389" style:family="text">
      <style:text-properties officeooo:rsid="0108c57f"/>
    </style:style>
    <style:style style:name="T390" style:family="text">
      <style:text-properties officeooo:rsid="01c4f291"/>
    </style:style>
    <style:style style:name="T391" style:family="text">
      <style:text-properties fo:font-size="10pt" officeooo:rsid="01c4f291" style:font-size-asian="10pt" style:font-size-complex="10pt"/>
    </style:style>
    <style:style style:name="T392" style:family="text">
      <style:text-properties officeooo:rsid="010c0b7b"/>
    </style:style>
    <style:style style:name="T393" style:family="text">
      <style:text-properties officeooo:rsid="010dbfd4"/>
    </style:style>
    <style:style style:name="T394" style:family="text">
      <style:text-properties fo:font-size="10pt" officeooo:rsid="00e1b81b" style:font-size-asian="8.75pt" style:font-size-complex="10pt"/>
    </style:style>
    <style:style style:name="T395" style:family="text">
      <style:text-properties fo:font-size="10pt" officeooo:rsid="011d5699" style:font-size-asian="10pt" style:font-size-complex="10pt"/>
    </style:style>
    <style:style style:name="T396" style:family="text">
      <style:text-properties fo:font-size="10pt" officeooo:rsid="020dbc54" style:font-size-asian="8.75pt" style:font-size-complex="10pt"/>
    </style:style>
    <style:style style:name="T397" style:family="text">
      <style:text-properties officeooo:rsid="01100d90"/>
    </style:style>
    <style:style style:name="T398" style:family="text">
      <style:text-properties fo:font-size="10pt" officeooo:rsid="01100d90" style:font-size-asian="10pt" style:font-size-complex="10pt"/>
    </style:style>
    <style:style style:name="T399" style:family="text">
      <style:text-properties officeooo:rsid="00e1d28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2.759cm, 2.882cm, 2.37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7cm" fo:text-indent="-0.27cm" fo:margin-left="0.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1.90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n Matrelli<text:span text:style-name="T1">’</text:span>s Legacy</text:p>
      <text:p text:style-name="P2"/>
      <text:p text:style-name="P2"/>
      <text:p text:style-name="P2"><draw:frame draw:style-name="fr1" draw:name="Image5" text:anchor-type="char" svg:width="12.345cm" svg:height="6.172cm" draw:z-index="4"><draw:image xlink:href="Pictures/1000000000000A0000000500F59CF76F.jpg" xlink:type="simple" xlink:show="embed" xlink:actuate="onLoad" draw:mime-type="image/jpeg"/></draw:frame></text:p>
      <text:p text:style-name="P2"/>
      <text:p text:style-name="P2"/>
      <text:p text:style-name="P3"/>
      <text:p text:style-name="P4">a mod for Grand Prix Circuit</text:p>
      <text:p text:style-name="P5"/>
      <text:p text:style-name="P6">by<text:span text:style-name="T2"> Alberto Marnetto</text:span></text:p>
      <text:p text:style-name="P7"/>
      <text:p text:style-name="P8"/>
      <text:p text:style-name="P9"><draw:frame draw:style-name="fr2" draw:name="Image4" text:anchor-type="char" svg:x="4.168cm" svg:y="0cm" svg:width="2.381cm" svg:height="2.369cm" draw:z-index="3"><draw:image xlink:href="Pictures/1000000000000300000002937EFD4B0E.png" xlink:type="simple" xlink:show="embed" xlink:actuate="onLoad" draw:mime-type="image/png"/></draw:frame></text:p>
      <text:p text:style-name="P10"/>
      <text:h text:style-name="P11" text:outline-level="1">The Story So Far</text:h>
      <text:p text:style-name="P12"/>
      <text:p text:style-name="P13">Many years have passed <text:span text:style-name="T3">since</text:span> the golden times of the Circuit, when Don Matrelli<text:span text:style-name="T4"> and</text:span> Bruno Gourdo battled for victories and glory while the backmarkers tried to stay clear from the dangers <text:span text:style-name="T5">posed by</text:span> Tse Sakamoto. New generations of drivers have appeared, trying to emulate the glory and the glamour of their predecessors.</text:p>
      <text:p text:style-name="P13"/>
      <text:p text:style-name="P13"><text:span text:style-name="T6">T</text:span><text:span text:style-name="T7">he </text:span>ne<text:span text:style-name="T6">xt</text:span> racing season is <text:span text:style-name="T6">about to </text:span>start, and after your impressive achievements in the lower series you have been given the possibility to join the <text:span text:style-name="T8">top</text:span><text:span text:style-name="T6"> </text:span><text:span text:style-name="T8">car racing division</text:span> and write your name in the history books of <text:span text:style-name="T8">motorsport</text:span>. Do you have what it takes to <text:span text:style-name="T6">claim</text:span> Don Matrelli’s legacy?</text:p>
      <text:p text:style-name="P12"/>
      <text:p text:style-name="P12"/>
      <text:h text:style-name="P14" text:outline-level="1">Introduction</text:h>
      <text:h text:style-name="P15" text:outline-level="1"/>
      <text:p text:style-name="P16"><text:span text:style-name="T9">Welcome to </text:span><text:span text:style-name="T10">Don </text:span><text:span text:style-name="T11">Matrelli</text:span><text:span text:style-name="T12">’</text:span><text:span text:style-name="T11">s</text:span><text:span text:style-name="T10"> Legacy</text:span><text:span text:style-name="T9">! This expansion </text:span><text:span text:style-name="T13">takes place in the same universe of </text:span><text:span text:style-name="T14">Gran</text:span><text:span text:style-name="T15">d</text:span><text:span text:style-name="T14"> Prix Circuit</text:span><text:span text:style-name="T13">, but in a later year</text:span><text:span text:style-name="T16">:</text:span><text:span text:style-name="T17"> the track calendar has seen changes, new teams have entered the fray and a batch of </text:span><text:span text:style-name="T18">fresh</text:span><text:span text:style-name="T17"> competitors has replaced the old guard.</text:span><text:span text:style-name="T19"> The world has also </text:span><text:span text:style-name="T13">evolved</text:span><text:span text:style-name="T19">, but </text:span><text:span text:style-name="T20">in this </text:span><text:span text:style-name="T9">time</text:span><text:span text:style-name="T20">line, </text:span><text:span text:style-name="T21">for some reason</text:span><text:span text:style-name="T22">,</text:span><text:span text:style-name="T19"> the cars still have a manual transmission.</text:span></text:p>
      <text:p text:style-name="P17"/>
      <text:p text:style-name="P18"><text:span text:style-name="T11">Don Matrelli</text:span><text:span text:style-name="T12">’</text:span><text:span text:style-name="T11">s Legacy </text:span><text:span text:style-name="T23">keeps the gameplay</text:span><text:span text:style-name="T24"> of the original game</text:span><text:span text:style-name="T23">, but it </text:span><text:span text:style-name="T25">features new content to offer you a novel challenge.</text:span></text:p>
      <text:p text:style-name="P18"/>
      <text:p text:style-name="P19"><text:span text:style-name="T25">First of all, this expansion contains</text:span><text:span text:style-name="T24"> three new tracks</text:span><text:span text:style-name="T25">,</text:span><text:span text:style-name="T24"> featuring the best </text:span><text:span text:style-name="T26">from</text:span><text:span text:style-name="T24"> the past, the present and the future of motor racing</text:span><text:span text:style-name="T26">.</text:span></text:p>
      <text:p text:style-name="P20"/>
      <text:p text:style-name="P20"><text:span text:style-name="T25">Then come </text:span><text:span text:style-name="T26">the </text:span>new <text:span text:style-name="T27">race</text:span>cars<text:span text:style-name="T26">. Some of them are better than other</text:span><text:span text:style-name="T28">s</text:span><text:span text:style-name="T26">, </text:span><text:span text:style-name="T29">allowing </text:span><text:span text:style-name="T26">you </text:span><text:span text:style-name="T28">to </text:span><text:span text:style-name="T29">adjust the</text:span><text:span text:style-name="T26"> level of challenge. The</text:span><text:span text:style-name="T30"> three cars</text:span><text:span text:style-name="T26"> also require noticeably different driv</text:span><text:span text:style-name="T31">ing </text:span><text:span text:style-name="T26">styles to express their </text:span><text:span text:style-name="T32">full </text:span><text:span text:style-name="T26">potential.</text:span> As always, any resemblance to really existing teams is purely incidental... </text:p>
      <text:p text:style-name="P17"/>
      <text:p text:style-name="P21"><text:span text:style-name="T26">Finally, you will face brand new opponents. </text:span><text:span text:style-name="T24">This mod is </text:span><text:span text:style-name="T33">aimed to exper</text:span><text:span text:style-name="T34">ienced</text:span><text:span text:style-name="T24"> </text:span><text:span text:style-name="T35">Grand Prix Circuit </text:span><text:span text:style-name="T24">players, so the difficulty level is higher.</text:span><text:span text:style-name="T36"> </text:span><text:span text:style-name="T24">E</text:span><text:span text:style-name="T37">specially at the highe</text:span><text:span text:style-name="T38">r</text:span><text:span text:style-name="T37"> difficulty level</text:span><text:span text:style-name="T38">s</text:span><text:span text:style-name="T39">,</text:span><text:span text:style-name="T40"> top drivers will sometimes be </text:span><text:span text:style-name="T24">impossible to reach. </text:span><text:span text:style-name="T40">Accept that</text:span><text:span text:style-name="T41"> as a fact of life</text:span><text:span text:style-name="T37">: the Circuit is unfair, and so is this game.</text:span></text:p>
      <text:h text:style-name="P11" text:outline-level="1">System Requirements</text:h>
      <text:p text:style-name="P22"/>
      <text:p text:style-name="P16"><text:span text:style-name="T42">Don </text:span><text:span text:style-name="T11">Matrelli</text:span><text:span text:style-name="T12">’</text:span><text:span text:style-name="T11">s</text:span><text:span text:style-name="T42"> Legacy</text:span><text:span text:style-name="T43"> </text:span><text:span text:style-name="T44">can</text:span><text:span text:style-name="T43"> run on most system</text:span><text:span text:style-name="T44">s</text:span><text:span text:style-name="T43"> able to start </text:span><text:span text:style-name="T35">Grand Prix Circuit</text:span><text:span text:style-name="T43">. </text:span><text:span text:style-name="T45">D</text:span><text:span text:style-name="T43">ue to the improved graphics, </text:span><text:span text:style-name="T46">only</text:span><text:span text:style-name="T43"> EGA </text:span><text:span text:style-name="T47">video </text:span><text:span text:style-name="T48">cards</text:span><text:span text:style-name="T46"> </text:span><text:span text:style-name="T48">are</text:span><text:span text:style-name="T46"> supported.</text:span></text:p>
      <text:p text:style-name="P23"/>
      <text:h text:style-name="P24" text:outline-level="1">Installation and Usage</text:h>
      <text:p text:style-name="Standard"/>
      <text:p text:style-name="P16"><text:span text:style-name="T49">To </text:span><text:span text:style-name="T50">play</text:span><text:span text:style-name="T49"> </text:span><text:span text:style-name="T10">Don </text:span><text:span text:style-name="T11">Matrelli</text:span><text:span text:style-name="T12">’</text:span><text:span text:style-name="T11">s</text:span><text:span text:style-name="T10"> Legacy</text:span><text:span text:style-name="T49"> </text:span><text:span text:style-name="T50">you need a copy of the base game </text:span><text:span text:style-name="T35">Grand Prix Circuit</text:span><text:span text:style-name="T51">. C</text:span><text:span text:style-name="T49">opy all the files </text:span><text:span text:style-name="T50">of the mod </text:span><text:span text:style-name="T49">into the directory containing</text:span><text:span text:style-name="T52"> the original</text:span><text:span text:style-name="T50"> </text:span><text:span text:style-name="T53">GPEGA</text:span><text:span text:style-name="T54">.EXE</text:span><text:span text:style-name="T55">. No</text:span><text:span text:style-name="T56">ne of the original</text:span><text:span text:style-name="T55"> file</text:span><text:span text:style-name="T56">s</text:span><text:span text:style-name="T55"> will be overwritten.</text:span></text:p>
      <text:p text:style-name="P25"><text:span text:style-name="T19"/></text:p>
      <text:p text:style-name="P26">To start <text:span text:style-name="T57">playing </text:span><text:span text:style-name="T58">the </text:span>mod, run</text:p>
      <text:p text:style-name="P27"/>
      <text:p text:style-name="P28">GPEGA2</text:p>
      <text:p text:style-name="P26"/>
      <text:p text:style-name="P29"><text:span text:style-name="T59">Optionally</text:span>, <text:span text:style-name="T60">instead of playing the full expansion </text:span>you can select<text:span text:style-name="T60">ively activate the new content </text:span>by <text:span text:style-name="T61">appending</text:span> the following <text:span text:style-name="T61">parameters</text:span>:</text:p>
      <text:p text:style-name="P26"/>
      <text:p text:style-name="P26"><text:span text:style-name="T62">/C</text:span><text:tab/>enable<text:span text:style-name="T63">s</text:span> the new cars</text:p>
      <text:p text:style-name="P26"><text:span text:style-name="T62">/T</text:span><text:tab/>enable<text:span text:style-name="T63">s </text:span>the new tracks</text:p>
      <text:p text:style-name="P26"><text:span text:style-name="T62">/O</text:span><text:tab/>enable<text:span text:style-name="T63">s</text:span> the new opponents</text:p>
      <text:p text:style-name="P26"/>
      <text:p text:style-name="P30">For example, run <text:span text:style-name="T62">GPEGA2 /T /O</text:span> to play with the new tracks and opponents, but <text:span text:style-name="T64">using </text:span>the original cars. An interesting challenge in this variant is to drive a McLaren on the Möbius circuit and try to send it over 216 mph.</text:p>
      <text:p text:style-name="P31"/>
      <text:h text:style-name="P32" text:outline-level="1">Known Bugs</text:h>
      <text:p text:style-name="P33"/>
      <text:p text:style-name="P33"><text:span text:style-name="T65">D</text:span>uring testing<text:span text:style-name="T66">, some </text:span><text:span text:style-name="T67">bugs were found</text:span> that could not be <text:span text:style-name="T68">eliminated</text:span>:</text:p>
      <text:p text:style-name="P33"/>
      <text:p text:style-name="P33">1. Track corruption: after playing many races in a row, glitches may appear, leading to the car’s position suddently <text:span text:style-name="T69">jerking</text:span>, or to a<text:span text:style-name="T70"> </text:span><text:span text:style-name="T71">program </text:span>crash<text:span text:style-name="T71">.</text:span></text:p>
      <text:p text:style-name="P33">2. Soft lock: if the car’s health is depleted a<text:span text:style-name="T65">fter a </text:span><text:span text:style-name="T72">minor collision</text:span>, you might be left stranded on the track: the car will be unable to run but you won’t be <text:span text:style-name="T65">towed to the pit</text:span>. Pressing Esc will <text:span text:style-name="T65">return</text:span> to the main screen, but this will destroy all your <text:span text:style-name="T65">season </text:span>progress.</text:p>
      <text:p text:style-name="P33"/>
      <text:p text:style-name="P34">To mitigate these issues, we recommend to save the game after each race when <text:span text:style-name="T73">playing</text:span> in the Championship. Moreover, <text:span text:style-name="T74">we</text:span> <text:span text:style-name="T74">suggest</text:span> <text:span text:style-name="T75">to </text:span>re<text:span text:style-name="T76">boot</text:span> the program at mid-season (between Baku and <text:span text:style-name="T77">Silverstone</text:span>).</text:p>
      <text:h text:style-name="P11" text:outline-level="1">The Cars</text:h>
      <text:p text:style-name="P35"/>
      <text:p text:style-name="P36">Unfortunately, the <text:span text:style-name="T78">three </text:span><text:span text:style-name="T79">historical</text:span> <text:span text:style-name="T78">teams</text:span> <text:span text:style-name="T79">of the Circuit </text:span><text:span text:style-name="T80">will not</text:span> offer you a seat <text:span text:style-name="T81">since they </text:span>have decided to confirm their <text:span text:style-name="T82">current drivers </text:span><text:span text:style-name="T83">for the incoming season</text:span>. But fear not, for <text:span text:style-name="T84">other</text:span> <text:span text:style-name="T85">constructors</text:span> have noticed your talent and would be glad to <text:span text:style-name="T86">see</text:span> you join<text:span text:style-name="T86">ing</text:span> their ranks!</text:p>
      <text:p text:style-name="P35"/>
      <text:h text:style-name="Para2" text:outline-level="2">Rivella</text:h>
      <text:p text:style-name="P37"/>
      <text:p text:style-name="P38">“<text:span text:style-name="T10">The</text:span><text:span text:style-name="T87">y</text:span><text:span text:style-name="T10"> </text:span><text:span text:style-name="T87">used to </text:span><text:span text:style-name="T10">call us a beginner's </text:span><text:span text:style-name="T35">team</text:span><text:span text:style-name="T10">. They </text:span><text:span text:style-name="T88">stopped </text:span><text:span text:style-name="T89">do</text:span><text:span text:style-name="T87">ing that </text:span><text:span text:style-name="T10">when our </text:span><text:span text:style-name="T90">‘</text:span><text:span text:style-name="T10">beginners</text:span><text:span text:style-name="T90">’</text:span><text:span text:style-name="T10"> started to beat their top drivers</text:span>”<text:span text:style-name="T91">.</text:span></text:p>
      <text:p text:style-name="P39">Guido Sterzer, team principal of Rivella Racing</text:p>
      <text:p text:style-name="P40"><text:span text:style-name="T92">The </text:span>Rivella <text:span text:style-name="T92">Racing Team </text:span>is <text:span text:style-name="T93">one of </text:span>the youngest <text:span text:style-name="T92">entr</text:span><text:span text:style-name="T93">ies</text:span><text:span text:style-name="T92"> in the </text:span><text:span text:style-name="T94">Circus</text:span>, but<text:span text:style-name="T95"> </text:span>it<text:span text:style-name="T96"> </text:span><text:span text:style-name="T97">has quickly risen to </text:span><text:span text:style-name="T98">the status </text:span><text:span text:style-name="T96">of </text:span><text:span text:style-name="T99">title </text:span><text:span text:style-name="T96">contender</text:span>. The team<text:span text:style-name="T100">, carrying the brand of Switzerland’s favourite alcohol-free beverage, </text:span><text:span text:style-name="T95">joined the </text:span><text:span text:style-name="T94">division</text:span><text:span text:style-name="T95"> three years ago </text:span>among general skepticism (“a producer of soft drinks <text:span text:style-name="T100">from</text:span> a small Alpine nation <text:span text:style-name="T101">is now fielding racecars</text:span>? <text:span text:style-name="T101">Such </text:span>things can only happen in a video game!”) but soon astonished the competition with <text:span text:style-name="T102">its</text:span> performance. </text:p>
      <text:p text:style-name="P41"/>
      <text:p text:style-name="P42">The strong<text:span text:style-name="T103">est</text:span> point of the<text:span text:style-name="T104">ir</text:span> <text:span text:style-name="T105">blue-and-red </text:span>car, whose designer’s identity is kept secret<text:span text:style-name="T106">,</text:span> is its aerodynamics. <text:span text:style-name="T107">Indeed</text:span> the Rivella can generate an impressive amount of downforce, giving it the best cornering capabilities in the field without creating too much drag<text:span text:style-name="T108"> on the straights</text:span>. </text:p>
      <text:p text:style-name="P41"/>
      <text:p text:style-name="P43">The engine has been a <text:span text:style-name="T109">liability</text:span><text:span text:style-name="T100"> in the past seasons</text:span>, but <text:span text:style-name="T100">this time </text:span>Rivella seems to have finally found a good powertrain. The V8 Cosworth <text:span text:style-name="T110">is not</text:span> <text:span text:style-name="T100">particularly </text:span><text:span text:style-name="T110">impressive</text:span> <text:span text:style-name="T111">in terms of raw </text:span>peak power, but it is a very <text:span text:style-name="T112">smooth</text:span> engine, able to generate <text:span text:style-name="T113">high</text:span><text:span text:style-name="T114"> </text:span>torque at <text:span text:style-name="T115">any</text:span> <text:span text:style-name="T115">rotational rate</text:span><text:span text:style-name="T112"> and compensate with traction and acceleration what it lacks in top speed.</text:span></text:p>
      <text:p text:style-name="P43"/>
      <text:p text:style-name="P43"><text:span text:style-name="T112">If you </text:span><text:span text:style-name="T116">join</text:span><text:span text:style-name="T112"> Rivella, be careful. The </text:span><text:span text:style-name="T116">car</text:span><text:span text:style-name="T112">, with its great handling and</text:span> <text:span text:style-name="T112">quick speed recovery, might be forgiving, but the management is not. The leadership knows that th</text:span><text:span text:style-name="T117">ey</text:span><text:span text:style-name="T112"> </text:span><text:span text:style-name="T118">have </text:span><text:span text:style-name="T119">c</text:span><text:span text:style-name="T112">hampionship</text:span><text:span text:style-name="T118">-worthy </text:span><text:span text:style-name="T120">material</text:span><text:span text:style-name="T112"> </text:span><text:span text:style-name="T117">this year </text:span><text:span text:style-name="T112">and expects you to bring home the trophy. </text:span><text:span text:style-name="T121">Any</text:span><text:span text:style-name="T112"> </text:span><text:span text:style-name="T122">mistake</text:span><text:span text:style-name="T112"> you commit will remind them </text:span><text:span text:style-name="T123">of</text:span><text:span text:style-name="T112"> the other dozen of candidates who would do anything to be in your seat. Give your best and exploit the car’s strong points to the fullest!</text:span></text:p>
      <text:p text:style-name="P43"><text:line-break/></text:p>
      <text:h text:style-name="Para2" text:outline-level="2"><text:soft-page-break/>Anglo-German</text:h>
      <text:p text:style-name="P44"/>
      <text:p text:style-name="P45">“<text:span text:style-name="T10">Focused, precise, always one step ahead, with an eye for detail </text:span><text:span text:style-name="T35">– </text:span><text:span text:style-name="T10">and an obsession for power</text:span><text:span text:style-name="T90">!</text:span>”</text:p>
      <text:p text:style-name="P46">Sir Hugo <text:span text:style-name="T49">Wulf</text:span><text:span text:style-name="T124">, owner of Anglo-German</text:span><text:span text:style-name="T125">, speaking about </text:span><text:span text:style-name="T126">his</text:span><text:span text:style-name="T125"> </text:span><text:span text:style-name="T127">dream</text:span><text:span text:style-name="T125"> driver</text:span></text:p>
      <text:p text:style-name="P47">The Anglo-German <text:span text:style-name="T128">Motorsport</text:span> Alliance is a consortium of some of the oldest carmakers <text:span text:style-name="T129">from</text:span> the two <text:span text:style-name="T130">founding </text:span>nations. The<text:span text:style-name="T131"> team</text:span> entered the Circuit <text:span text:style-name="T132">six years ago, </text:span>bringing top talent and capital<text:span text:style-name="T133">,</text:span><text:span text:style-name="T92"> aiming to</text:span><text:span text:style-name="T130"> harvest victories. The </text:span><text:span text:style-name="T134">task was </text:span><text:span text:style-name="T130">accomplished with ruthless efficiency</text:span><text:span text:style-name="T135">: their cars (“Green and gray, but more gray than green and, most imp</text:span><text:span text:style-name="T136">or</text:span><text:span text:style-name="T135">tantly, dark”)</text:span><text:span text:style-name="T130"> </text:span><text:span text:style-name="T135">ha</text:span><text:span text:style-name="T137">ve</text:span><text:span text:style-name="T135"> won</text:span><text:span text:style-name="T130"> the last four </text:span><text:span text:style-name="T138">Championships</text:span><text:span text:style-name="T139">, </text:span><text:span text:style-name="T140">and</text:span><text:span text:style-name="T139"> </text:span><text:span text:style-name="T130">most of the individual races.</text:span></text:p>
      <text:p text:style-name="P47"/>
      <text:p text:style-name="P48">This year, however, rumors say that the development did not go as planned. The new engine, <text:span text:style-name="T141">dedicated to </text:span>Charlemagne, aimed to beat all records in terms of torque and power. <text:span text:style-name="T142">It hit the performance target</text:span>, but at high cost: the resulting powertrain is big <text:span text:style-name="T143">and </text:span>heavy, requiring to compromise the car’s aerodynamics just to accommodate it and adding extra stress o<text:span text:style-name="T144">n</text:span> the tyres. Worse, optimal power generation is only reached at very high <text:span text:style-name="T145">rotational</text:span> speeds, with a noticeable <text:span text:style-name="T146">lack of torque </text:span><text:span text:style-name="T147">everywhere </text:span>below 10,000 rpm. The car might be great at Monza <text:span text:style-name="T148">and almost </text:span>unbeatable on the Möbius <text:span text:style-name="T149">strip</text:span>, but the tests on more technical circuits <text:span text:style-name="T150">have </text:span>show<text:span text:style-name="T150">n</text:span> all the <text:span text:style-name="T151">design </text:span>shortcomings.</text:p>
      <text:p text:style-name="P49"/>
      <text:p text:style-name="P50">To be successful with this year’s <text:span text:style-name="T8">Anglo-German</text:span> you will need to be a master of <text:span text:style-name="T152">all things </text:span>driving. Heavy foot on the accelerator will be required, as well as aggressive downshifting to always keep the engine in the “live<text:span text:style-name="T153">ly</text:span>” zone. All this will have to be combined with very sensi<text:span text:style-name="T154">tive</text:span> hand<text:span text:style-name="T155">s</text:span> on the wheel<text:span text:style-name="T156">: smooth steering is needed to </text:span><text:span text:style-name="T157">keep the car on track despite its </text:span>low grip.</text:p>
      <text:p text:style-name="P50"/>
      <text:p text:style-name="P51">An unexpected benefit of joining <text:span text:style-name="T8">Anglo-German</text:span> is its human side. Its leaders like to play the role of big villains, but they are actually quite supportive and protective towards their pilots. Also, they are technically minded people who try to cut the corporate nonsense to a minimum. All of them are aware that this year’s car is not as good as the past ones and will be grateful if someone manages nonetheless to bring it to <text:span text:style-name="T158">victory</text:span>. Will you be their man?</text:p>
      <text:p text:style-name="P52"/>
      <text:h text:style-name="P53" text:outline-level="2">Gastón Martin<text:span text:style-name="T159">i</text:span></text:h>
      <text:p text:style-name="P44"/>
      <text:p text:style-name="P54">“<text:span text:style-name="T90">We wrote a parody piece about them. </text:span><text:span text:style-name="T160">L’Equipe</text:span><text:span text:style-name="T90"> wrote a serious piece about them. They turned out to be the same article</text:span>”<text:span text:style-name="T161">.</text:span></text:p>
      <text:p text:style-name="P55"><text:span text:style-name="T162">Thierry Santoro, journalist at the satyrical newspaper </text:span><text:span text:style-name="T163">Le Canard enchainé</text:span></text:p>
      <text:p text:style-name="P56">The Gastón Martin<text:span text:style-name="T164">i</text:span> Formula, toy team of the eponymous Franco-Italian businessman, is the demonstration <text:span text:style-name="T165">that </text:span>low entry barr<text:span text:style-name="T166">i</text:span>ers are not always a good thing. It is unclear <text:span text:style-name="T167">whence </text:span>Mr. Martini <text:span text:style-name="T167">got</text:span> the capital to <text:span text:style-name="T168">create</text:span><text:span text:style-name="T166"> the team. Also unclear is the way he managed to procure all the components needed to build what, at least superficially, resembles a racecar. The biggest mistery, of course, is how vehicle and team got </text:span><text:span text:style-name="T169">a</text:span><text:span text:style-name="T166"> licence to compete in the s</text:span><text:span text:style-name="T170">elf</text:span><text:span text:style-name="T166">-</text:span><text:span text:style-name="T170">appointed</text:span><text:span text:style-name="T166"> “pinnacle of motorsport”.</text:span></text:p>
      <text:p text:style-name="P56"/>
      <text:p text:style-name="P56"><text:span text:style-name="T166">Be it as it may, the first disastrous season did not deter the </text:span><text:span text:style-name="T171">patron</text:span><text:span text:style-name="T166"> to sign up for a new year of racing. Their </text:span><text:span text:style-name="T172">only </text:span><text:span text:style-name="T166">pilot </text:span><text:span text:style-name="T173">has hastily</text:span><text:span text:style-name="T166"> </text:span><text:span text:style-name="T174">left </text:span><text:span text:style-name="T166">– </text:span><text:span text:style-name="T175">same</text:span><text:span text:style-name="T166"> as his three predecessors – so the</text:span><text:span text:style-name="T176"> team is</text:span><text:span text:style-name="T166"> looking for you as </text:span><text:span text:style-name="T177">a </text:span><text:span text:style-name="T166">replacement. Due to the low number of </text:span><text:span text:style-name="T159">candidates</text:span><text:span text:style-name="T166">, </text:span><text:span text:style-name="T159">the </text:span><text:span text:style-name="T166">Gastón Martini </text:span><text:span text:style-name="T159">management is </text:span><text:span text:style-name="T166">even open to lower their demands </text:span><text:span text:style-name="T178">about</text:span><text:span text:style-name="T166"> sponsor money, even if this will further affect the </text:span><text:span text:style-name="T179">vehicle </text:span><text:span text:style-name="T166">maintenance and </text:span><text:span text:style-name="T180">the regularity of the paychecks</text:span><text:span text:style-name="T181"> for the staff</text:span><text:span text:style-name="T166">.</text:span></text:p>
      <text:p text:style-name="P56"/>
      <text:p text:style-name="P57"><text:span text:style-name="T166">Just as last year, the </text:span><text:span text:style-name="T182">Gastón Martin</text:span><text:span text:style-name="T164">i</text:span><text:span text:style-name="T166"> is an awful car, with no saving grace except maybe its cut</text:span><text:span text:style-name="T183">e</text:span><text:span text:style-name="T166"> green</text:span><text:span text:style-name="T184">-and-white</text:span><text:span text:style-name="T166"> livery. </text:span><text:span text:style-name="T183">The </text:span>chassis<text:span text:style-name="T183"> is the </text:span><text:span text:style-name="T185">same</text:span><text:span text:style-name="T186"> of </text:span><text:span text:style-name="T187">the past</text:span><text:span text:style-name="T183"> season; the powe</text:span><text:span text:style-name="T188">r</text:span><text:span text:style-name="T183">train is even worse since the old engine </text:span><text:span text:style-name="T189">failed </text:span><text:span text:style-name="T190">beyond repair</text:span><text:span text:style-name="T183"> and </text:span><text:span text:style-name="T190">its replacement </text:span><text:span text:style-name="T183">seems taken from a lower Formula and tuned </text:span><text:span text:style-name="T191">above</text:span><text:span text:style-name="T183"> its operational limits.</text:span></text:p>
      <text:p text:style-name="P57"/>
      <text:p text:style-name="P58">Approach the <text:span text:style-name="T182">Gastón Martin</text:span><text:span text:style-name="T164">i</text:span><text:span text:style-name="T166"> </text:span>with Zen spirit. You cannot win<text:span text:style-name="T192"> –</text:span> you will find it hard even to avoid <text:span text:style-name="T193">finishing last</text:span><text:span text:style-name="T192"> –</text:span> and most likely the engine will <text:span text:style-name="T194">blow</text:span> just when you <text:span text:style-name="T195">are</text:span><text:span text:style-name="T196"> </text:span>about to bring home your first point. On the other hand, if you manage to beat just a couple of adversaries, or maybe eve<text:span text:style-name="T197">n</text:span> <text:span text:style-name="T198">end</text:span> the season with a <text:span text:style-name="T195">handful</text:span> of points, you will be rightfully regarded as a master <text:span text:style-name="T199">and</text:span> get <text:span text:style-name="T199">tons of </text:span>offers from the top teams.<text:span text:style-name="T200"> Be patient, </text:span><text:span text:style-name="T201">overcome</text:span><text:span text:style-name="T200"> the pain, and never stop fighting.</text:span></text:p>
      <text:p text:style-name="P58"/>
      <text:p text:style-name="P59"><text:span text:style-name="T202">Warning:</text:span> the <text:span text:style-name="T203">starting </text:span>tyres on your <text:span text:style-name="T182">Gastón Martin</text:span><text:span text:style-name="T204">i</text:span> are the only set of slicks <text:span text:style-name="T205">t</text:span>he<text:span text:style-name="T206"> t</text:span><text:span text:style-name="T205">eam managed to buy</text:span>. If you pit for a replacement, the mechanics will be forced to swap them with <text:span text:style-name="T207">rain</text:span> tyres. You might not like the <text:span text:style-name="T208">consequences</text:span>...</text:p>
      <text:h text:style-name="P11" text:outline-level="1">The Tracks</text:h>
      <text:p text:style-name="P37"/>
      <text:p text:style-name="P60">The calendar of the Circuit changes very slowly, but it does change. Since Don Matrelli’s era three circuits have disappeared: the Hockenheimring’s absence is only temporary, as the track is undergoing a multi-year restructuring project, but the Monaco G.P. has been dropped forever after the famous scandal involving the second cousin of the Prince and the aunt of the then-president of the Automobile Federation. As for Detroit, <text:span text:style-name="T209">we all </text:span>agree it should<text:span text:style-name="T209"> never</text:span> have been included in <text:span text:style-name="T209">a top racing championship</text:span>.</text:p>
      <text:p text:style-name="P60"/>
      <text:p text:style-name="P61">Here a<text:span text:style-name="T210">re </text:span>the <text:span text:style-name="T211">venues</text:span><text:span text:style-name="T212"> making a new appearance</text:span>.</text:p>
      <text:p text:style-name="P37"/>
      <text:h text:style-name="P62" text:outline-level="2">Circuit de Sp<draw:frame draw:style-name="fr3" draw:name="Image1" text:anchor-type="char" svg:y="1.021cm" svg:width="9.389cm" svg:height="5.803cm" draw:z-index="0"><draw:image xlink:href="Pictures/1001723C0000925300005A77E1C612EE.svg" xlink:type="simple" xlink:show="embed" xlink:actuate="onLoad" draw:mime-type="image/svg+xml"/><draw:image xlink:href="Pictures/10000001000003830000022C1278E5F8.png" xlink:type="simple" xlink:show="embed" xlink:actuate="onLoad" draw:mime-type="image/png"/></draw:frame>a-Francorchamps </text:h>
      <text:h text:style-name="P62" text:outline-level="2"/>
      <text:p text:style-name="P63"/>
      <text:p text:style-name="P63"/>
      <text:p text:style-name="P64"/>
      <text:p text:style-name="P64">This legendary <text:span text:style-name="T211">track</text:span> <text:span text:style-name="T213">needs no </text:span><text:span text:style-name="T214">introduction</text:span>. It <text:span text:style-name="T215">has been</text:span> re<text:span text:style-name="T216">adde</text:span>d by popular demand for the joy of drivers and fans alike. Driving on it is a honour, but also a demanding task: it’s the longest of the <text:span text:style-name="T217">calendar</text:span>, and its mix of high-speed curves, long straights and technical sections make<text:span text:style-name="T218">s</text:span> it very difficult to master. <text:span text:style-name="T219">This year the race takes </text:span><text:span text:style-name="T220">place</text:span><text:span text:style-name="T219"> at the </text:span><text:span text:style-name="T221">beginning</text:span><text:span text:style-name="T219"> of the autumn, with increased risk of bad weather</text:span><text:span text:style-name="T222">.</text:span></text:p>
      <text:p text:style-name="P64"/>
      <text:p text:style-name="P65">With this <text:span text:style-name="T219">season</text:span>’s regulations, it seems some sections <text:span text:style-name="T223">of Spa </text:span><text:span text:style-name="T224">demand</text:span> <text:span text:style-name="T225">lower speeds </text:span>than usual: the test<text:span text:style-name="T226"> drivers</text:span><text:span text:style-name="T227"> of </text:span>Anglo-German were disappointed by the <text:span text:style-name="T228">inability</text:span> of their car to negotiate the Eau Rouge at full throttle, and <text:span text:style-name="T229">t</text:span>he <text:soft-page-break/>new version of the <text:span text:style-name="T230">final</text:span><text:span text:style-name="T231"> </text:span>chicane <text:span text:style-name="T232">required them to</text:span><text:span text:style-name="T233"> shift down to the first gear</text:span>. Whatever car you drive, it’s up to you to find a way to optimize the <text:span text:style-name="T234">cornering</text:span> and <text:span text:style-name="T235">unleash</text:span> the engine on the straight sections.</text:p>
      <text:p text:style-name="P63"/>
      <text:p text:style-name="P63"/>
      <text:h text:style-name="P62" text:outline-level="2"><text:span text:style-name="T124">Baku City Circuit (</text:span><text:span text:style-name="T236">Bakı Şəhər Halqası</text:span><text:span text:style-name="T237">)</text:span></text:h>
      <text:p text:style-name="P63"/>
      <text:p text:style-name="P63"/>
      <text:p text:style-name="P63"/>
      <text:p text:style-name="P66"><draw:frame draw:style-name="fr1" draw:name="Image2" text:anchor-type="char" svg:width="8.46cm" svg:height="5.846cm" draw:z-index="1"><draw:image xlink:href="Pictures/10015F9400010CA40000C7108C295E0A.svg" xlink:type="simple" xlink:show="embed" xlink:actuate="onLoad" draw:mime-type="image/svg+xml"/><draw:image xlink:href="Pictures/100000010000033500000261ACBEA373.png" xlink:type="simple" xlink:show="embed" xlink:actuate="onLoad" draw:mime-type="image/png"/></draw:frame></text:p>
      <text:p text:style-name="P66"/>
      <text:p text:style-name="P67">The <text:span text:style-name="T238">roads of Baku will </text:span><text:span text:style-name="T239">set the scene for </text:span><text:span text:style-name="T238">the </text:span><text:span text:style-name="T240">newly-minted</text:span> <text:span text:style-name="T241">Azerbaijan</text:span> <text:span text:style-name="T241">Grand Prix. The transcaucasian nation has enjoyed </text:span><text:span text:style-name="T242">strong </text:span><text:span text:style-name="T241">economic </text:span><text:span text:style-name="T243">and technological </text:span><text:span text:style-name="T244">growth </text:span><text:span text:style-name="T241">in the past years, and hosting a</text:span><text:span text:style-name="T245"> premier motor</text:span><text:span text:style-name="T246"> </text:span><text:span text:style-name="T245">racing </text:span><text:span text:style-name="T241">event is one of the many </text:span><text:span text:style-name="T247">initiatives</text:span><text:span text:style-name="T241"> of its leadership to increase its global prestige.</text:span></text:p>
      <text:p text:style-name="P68"/>
      <text:p text:style-name="P69"><text:span text:style-name="T241">The </text:span><text:span text:style-name="T248">c</text:span><text:span text:style-name="T241">ircuit offers fantastic views of the sea and of the </text:span><text:span text:style-name="T249">city</text:span><text:span text:style-name="T241">. From the beautiful </text:span><text:span text:style-name="T248">Baku </text:span><text:span text:style-name="T241">Fortress built in </text:span><text:span text:style-name="T250">year </text:span><text:span text:style-name="T241">1138 to futuristic </text:span><text:span text:style-name="T251">glass </text:span><text:span text:style-name="T241">skyscrapers like the Flame Towers, a lap around the </text:span><text:span text:style-name="T252">track</text:span><text:span text:style-name="T241"> is like a miniature trip in the city history. But don’t let t</text:span><text:span text:style-name="T253">hat</text:span><text:span text:style-name="T241"> distract you: </text:span><text:span text:style-name="T254">same as</text:span><text:span text:style-name="T255"> </text:span><text:span text:style-name="T256">in </text:span><text:span text:style-name="T241">every </text:span><text:span text:style-name="T257">street</text:span><text:span text:style-name="T241"> circuit, </text:span><text:span text:style-name="T249">90-degree</text:span><text:span text:style-name="T241"> </text:span><text:span text:style-name="T254">corners</text:span><text:span text:style-name="T241"> are everywhere, and </text:span><text:span text:style-name="T249">before getting to </text:span><text:span text:style-name="T241">the long straight leading to the finish line </text:span><text:span text:style-name="T249">you will have to negotiate the labyrinth of sharp curves surrounding the </text:span><text:span text:style-name="T241">Old Town</text:span><text:span text:style-name="T249">.</text:span><text:span text:style-name="T258"> Memorize every critical point and hope that the tarmac does not eat up your tyres, as it happened to Mr. Hermann some years ago.</text:span></text:p>
      <text:p text:style-name="P70"/>
      <text:h text:style-name="P71" text:outline-level="2">Möbius Space Dragstrip (<text:span text:style-name="T10">Möbius Raumdragsterrennstrecke</text:span>)</text:h>
      <text:h text:style-name="P72" text:outline-level="2"/>
      <text:p text:style-name="P37"><draw:frame draw:style-name="fr4" draw:name="Image3" text:anchor-type="char" svg:width="10.8cm" svg:height="5.209cm" draw:z-index="2"><draw:image xlink:href="Pictures/1001C10D00010CB80000819B983C20DD.svg" xlink:type="simple" xlink:show="embed" xlink:actuate="onLoad" draw:mime-type="image/svg+xml"/><draw:image xlink:href="Pictures/10000001000003FA000001EB871DB47A.png" xlink:type="simple" xlink:show="embed" xlink:actuate="onLoad" draw:mime-type="image/png"/></draw:frame></text:p>
      <text:p text:style-name="P73">A circuit that is literally out of this world. Möbius is a track built in space, near one of the Earth’s Lagrangian points. It consists in a strip of asphalt that, due to physical effects, appear<text:span text:style-name="T259">s</text:span> straight but is actually knotted on itself: about 20 seconds after leaving the finish line, the driver returns to the starting point, except he find<text:span text:style-name="T260">s</text:span> itself on the opposite side of the <text:span text:style-name="T261">asphalt</text:span>! It takes other 20 seconds to run through the strip a second time and finally complete the lap.<text:span text:style-name="T262"> </text:span><text:span text:style-name="T263">The curves on the circuit </text:span><text:span text:style-name="T264">a</text:span><text:span text:style-name="T263">re named in honor of European mathematicians</text:span><text:span text:style-name="T265"> of all </text:span><text:span text:style-name="T266">historical </text:span><text:span text:style-name="T265">eras</text:span><text:span text:style-name="T263">.</text:span></text:p>
      <text:p text:style-name="P74"/>
      <text:p text:style-name="P75">The <text:span text:style-name="T267">Möbius track</text:span> was built in <text:span text:style-name="T268">a</text:span> <text:span text:style-name="T269">brief</text:span> era of optimism and international collaboration that preceded the return to the usual global chaos: the project enjoyed the scientific and financial contribution<text:span text:style-name="T270">s</text:span> of 33 nations<text:span text:style-name="T271"> under the leadership of Germany</text:span>, and was even competed on time!<text:span text:style-name="T271"> The original </text:span><text:span text:style-name="T272">design</text:span><text:span text:style-name="T271"> foresaw a pure dragster track, and indeed the road was built perfectly straight. A few days after the inauguration, however, a gravitational collapse warped the structure, </text:span><text:span text:style-name="T273">bending the circuit in multiple points</text:span><text:span text:style-name="T271">. This accident was seen as bad omen for </text:span><text:span text:style-name="T274">the </text:span><text:span text:style-name="T271">things to come, but at least it made Möbius a more interesting racing place and not only a test track to measure the cars’ top speed.</text:span><text:span text:style-name="T263"> </text:span></text:p>
      <text:p text:style-name="P75"/>
      <text:p text:style-name="P75"><text:span text:style-name="T275">B</text:span>anners and yardage signs<text:span text:style-name="T275"> around the circuit</text:span> have a purely decorative purpose. To be taken seriously are instead the tunnels<text:span text:style-name="T276">. T</text:span>he so-called “fog tunnels” make it difficult to see track borders<text:span text:style-name="T277"> and opponents</text:span>, <text:span text:style-name="T278">and</text:span> the car will crash if it strays too far from the centreline<text:span text:style-name="T279">. T</text:span>he “dark<text:span text:style-name="T280">ness</text:span>-and-glass” gallery is less <text:span text:style-name="T281">treacherous</text:span> but still to be navigated with attention.</text:p>
      <text:p text:style-name="P74"/>
      <text:h text:style-name="P11" text:outline-level="1">The Opponents</text:h>
      <text:p text:style-name="Standard"/>
      <text:p text:style-name="P76">You have certainly heard about these <text:span text:style-name="T282">gentlemen</text:span> already, so we will be brief.</text:p>
      <text:p text:style-name="P76"/>
      <text:p text:style-name="P76"><text:span text:style-name="T202">Franz Hermann </text:span>(#1, Netherlands): the best driver of his generation<text:span text:style-name="T283">.</text:span><text:span text:style-name="T284"> If you manage to challenge him, let alone beat him, pat yourself on the back!</text:span></text:p>
      <text:p text:style-name="P76"/>
      <text:p text:style-name="P76"><text:span text:style-name="T202">Kim Leonardo</text:span> (#12, Italy): a rising star<text:span text:style-name="T283">.</text:span><text:span text:style-name="T284"> He has still some rough edges, but he is developing at impressive speed. Try to keep pace with him.</text:span></text:p>
      <text:p text:style-name="P76"/>
      <text:p text:style-name="P77"><text:span text:style-name="T202">Carl S</text:span><text:span text:style-name="T285">ain</text:span><text:span text:style-name="T202">t-Mleux</text:span><text:span text:style-name="T286"> (#16, Monaco): </text:span><text:span text:style-name="T287">beau et maudit</text:span><text:span text:style-name="T288">.</text:span><text:span text:style-name="T289"> His immense talent has somehow always been hampered by some stroke of bad luck.</text:span></text:p>
      <text:p text:style-name="P78"/>
      <text:p text:style-name="P79"><text:span text:style-name="T202">Aussie Priast</text:span><text:span text:style-name="T286"> (#81, Australia): fast and cold-blooded</text:span><text:span text:style-name="T283">.</text:span><text:span text:style-name="T284"> He can easily switch between daring overtakes and tactical management of the situation.</text:span></text:p>
      <text:p text:style-name="P77"/>
      <text:p text:style-name="P77"><text:span text:style-name="T202">Lord Blimey</text:span><text:span text:style-name="T286"> (#63, UK): very </text:span><text:span text:style-name="T284">skilled</text:span><text:span text:style-name="T286">, but </text:span><text:span text:style-name="T290">tends to </text:span><text:span text:style-name="T286">complain a lot</text:span><text:span text:style-name="T283">.</text:span><text:span text:style-name="T284"> He was a very promising talent, but somehow </text:span><text:span text:style-name="T291">he </text:span><text:span text:style-name="T284">never managed to fully bloom.</text:span></text:p>
      <text:p text:style-name="P77"/>
      <text:p text:style-name="P77"><text:span text:style-name="T202">Niño Matador</text:span><text:span text:style-name="T286"> (#55, Spain): son </text:span><text:span text:style-name="T292">of a</text:span><text:span text:style-name="T286"> </text:span><text:span text:style-name="T293">famous </text:span><text:span text:style-name="T286">rally champion</text:span><text:span text:style-name="T292">. </text:span><text:span text:style-name="T293">Not as amazing as the top drivers, but very competent and with g</text:span><text:span text:style-name="T294">reat tactical skills</text:span><text:span text:style-name="T295">.</text:span></text:p>
      <text:p text:style-name="P80"/>
      <text:p text:style-name="P81"><text:span text:style-name="T202">Sir Arbalestier</text:span> (#44, UK): <text:span text:style-name="T293">he dominated the Circuit for many years, </text:span>set<text:span text:style-name="T293">ting</text:span> an <text:span text:style-name="T296">amazing </text:span>number of records<text:span text:style-name="T283">.</text:span><text:span text:style-name="T293"> Now</text:span><text:span text:style-name="T297">adays</text:span><text:span text:style-name="T293"> he</text:span><text:span text:style-name="T297"> i</text:span><text:span text:style-name="T293">s slightly less hungry.</text:span></text:p>
      <text:p text:style-name="P81"/>
      <text:p text:style-name="P81"><text:span text:style-name="T202">Asnee Smylin</text:span> (#23, Thailand): great team<text:span text:style-name="T298"> player</text:span> and solid driver<text:span text:style-name="T283">.</text:span><text:span text:style-name="T299"> </text:span><text:span text:style-name="T300">He n</text:span><text:span text:style-name="T299">ever managed to make it</text:span><text:span text:style-name="T301"> </text:span><text:span text:style-name="T299">to the top, but </text:span><text:span text:style-name="T302">he </text:span><text:span text:style-name="T299">always bring</text:span><text:span text:style-name="T303">s</text:span><text:span text:style-name="T299"> home some points.</text:span></text:p>
      <text:p text:style-name="P81"/>
      <text:p text:style-name="P82"><text:span text:style-name="T304">Goro Inamoto</text:span><text:span text:style-name="T305"> (#22, Japan): not </text:span><text:span text:style-name="T306">a </text:span><text:span text:style-name="T307">top</text:span><text:span text:style-name="T306"> </text:span><text:span text:style-name="T308">driver</text:span><text:span text:style-name="T305">, but </text:span><text:span text:style-name="T306">he </text:span><text:span text:style-name="T309">attracts </text:span><text:span text:style-name="T310">many sponsors</text:span><text:span text:style-name="T311">. Also, </text:span><text:span text:style-name="T305">the Circuit </text:span><text:span text:style-name="T312">needs at least one </text:span><text:span text:style-name="T305">Japanese </text:span><text:span text:style-name="T313">pilot</text:span><text:span text:style-name="T312"> </text:span><text:span text:style-name="T314">to keep its traditions.</text:span></text:p>
      <text:p text:style-name="P80"/>
      <text:h text:style-name="P83" text:outline-level="1">Hints</text:h>
      <text:p text:style-name="P84"/>
      <text:p text:style-name="P85">First and foremost, we repeat the recommendation to save after every race while competing in the Championship Circuit.<text:span text:style-name="T315"> But, before you select that option, it’s better to begin with the practice mode and si</text:span><text:span text:style-name="T316">ng</text:span><text:span text:style-name="T315">le races.</text:span></text:p>
      <text:p text:style-name="P85"/>
      <text:p text:style-name="P86">Start by familiarizing with the new tracks and machinery. Get a feel for how the cars behave, learn their strong and weak points. Even just trying to determine the top speed of each car will reveal important information. You will also need to figure out a good lau<text:span text:style-name="T317">n</text:span>ch procedure, allowing you to start fast without blowing your engine.</text:p>
      <text:p text:style-name="P86"/>
      <text:p text:style-name="P87"><text:span text:style-name="T318">Y</text:span>ou might want to increase the number of laps in a race. We suggest at least 5: this will force you to manage vehicle damage <text:span text:style-name="T319">more </text:span>carefully, but also give you more time <text:span text:style-name="T319">to</text:span> overtak<text:span text:style-name="T319">e</text:span> the opponents. In many tracks you will start from the middle of the grid, so you will need enough time to gain positions.</text:p>
      <text:p text:style-name="P85"/>
      <text:p text:style-name="P88"><text:span text:style-name="T320">Note that</text:span><text:span text:style-name="T321"> </text:span><text:span text:style-name="T11">Don Matrelli</text:span><text:span text:style-name="T322">’</text:span><text:span text:style-name="T11">s Legacy</text:span><text:span text:style-name="T323"> </text:span><text:span text:style-name="T324">is harder </text:span><text:span text:style-name="T323">than the base game. </text:span><text:span text:style-name="T9">E</text:span><text:span text:style-name="T321">ven if you are used to </text:span><text:span text:style-name="T325">sweep the floor </text:span><text:span text:style-name="T9">against Travis Daye and Vito Giuffrè, do not expect to just select the </text:span><text:span text:style-name="T323">“pro”</text:span><text:span text:style-name="T9"> difficult</text:span><text:span text:style-name="T326">y</text:span><text:span text:style-name="T9"> level and win every race: the </text:span><text:span text:style-name="T327">new </text:span><text:span text:style-name="T9">opponents are much faster, and some of them </text:span><text:span text:style-name="T328">drive</text:span><text:span text:style-name="T329"> better cars than </text:span><text:span text:style-name="T330">yours</text:span><text:span text:style-name="T9">.</text:span><text:span text:style-name="T323"> To conquer the championship, you will need patience, skill and luck.</text:span><text:span text:style-name="T331"> If the experience is too frustrating, remember this is a game: set the difficulty level that makes the game most enjoyable for you.</text:span><text:span text:style-name="T332"> You can also race against the classic (weaker) opponents if you prefer.</text:span></text:p>
      <text:p text:style-name="P85"/>
      <text:p text:style-name="P85"><text:span text:style-name="T317">Given the stronger competition, y</text:span>ou are likely to get overtaken often. <text:span text:style-name="T317">Be aware that</text:span><text:span text:style-name="T318"> </text:span><text:span text:style-name="T319">the </text:span><text:span text:style-name="T333">opponents </text:span><text:span text:style-name="T317">often</text:span> <text:span text:style-name="T317">hit your car </text:span>while <text:span text:style-name="T317">passing</text:span>, damaging your health. If you feel <text:span text:style-name="T317">you are about to be overtaken</text:span>, try to stay <text:span text:style-name="T317">near the road side</text:span>: this reduce<text:span text:style-name="T317">s</text:span> the risk of <text:span text:style-name="T317">collisions</text:span>.</text:p>
      <text:p text:style-name="P85"/>
      <text:p text:style-name="P85">Be ready to accept the risk of DNF<text:span text:style-name="T334">s</text:span>: <text:span text:style-name="T318">the scoring system favours the brave. F</text:span><text:span text:style-name="T334">or example, a 50-50 chance of ending in second place or crashing is better than a 100% chance of ending in fifth place. Hence, make pit stops only if it’s really worth it. Note, also, that for one of the cars a pit stop basically means race over.</text:span></text:p>
      <text:p text:style-name="P85"/>
      <text:p text:style-name="P87">At the highest difficulty level it <text:span text:style-name="T318">is</text:span> impossible to win all the races: some opponents will set times your vehicle cannot reach. Focus on winning the tracks that best suit your car and minimize the losses on the others. You will also need a pinch of luck: hope for a <text:span text:style-name="T318">hard-</text:span>fought season <text:span text:style-name="T318">where</text:span> the opponents steal points from each other.</text:p>
      <text:h text:style-name="P89" text:outline-level="1">Acknowledgments</text:h>
      <text:p text:style-name="P90"/>
      <text:p text:style-name="P91"><text:span text:style-name="T335">Don </text:span><text:span text:style-name="T11">Matrelli</text:span><text:span text:style-name="T322">’</text:span><text:span text:style-name="T11">s</text:span><text:span text:style-name="T335"> Legacy</text:span> was made possible by the availability of various open-source tools. In particular, <text:span text:style-name="T336">we </text:span>wish to thank<text:span text:style-name="T337"> the following people:</text:span></text:p>
      <text:p text:style-name="P92"/>
      <text:list text:style-name="L1">
        <text:list-item>
          <text:p text:style-name="P93">Daniel Stien (“dstien”), “llm” and the other <text:span text:style-name="T338">contribut</text:span><text:span text:style-name="T339">o</text:span><text:span text:style-name="T338">rs </text:span><text:span text:style-name="T340">to</text:span><text:span text:style-name="T338"> </text:span>the <text:span text:style-name="T10">Stressed</text:span> resource editor</text:p>
          <text:p text:style-name="P94">https://github.com/dstien/stressed/</text:p>
          <text:p text:style-name="P94"/>
        </text:list-item>
        <text:list-item>
          <text:p text:style-name="P95"><text:span text:style-name="T341">“</text:span>albertus82<text:span text:style-name="T341">” and the other contributors </text:span><text:span text:style-name="T340">to</text:span><text:span text:style-name="T341"> the </text:span><text:span text:style-name="T342">cyclesmod</text:span><text:span text:style-name="T341"> </text:span><text:span text:style-name="T343">tool</text:span></text:p>
          <text:p text:style-name="P94">https://programitalia.wordpress.com/2015/02/09/cyclesmod/</text:p>
          <text:p text:style-name="P94"/>
        </text:list-item>
        <text:list-item>
          <text:p text:style-name="P96">Mark Tyler and the other <text:span text:style-name="T344">developers</text:span> of mtPaint<text:span text:style-name="T341"> </text:span></text:p>
          <text:p text:style-name="P94">https://mtpaint.sourceforge.net/</text:p>
          <text:p text:style-name="P94"/>
        </text:list-item>
        <text:list-item>
          <text:p text:style-name="P97">Fabrice Bellard and the other developers of FFmpeg</text:p>
          <text:p text:style-name="P98">https://ffmpeg.org</text:p>
          <text:p text:style-name="P98"/>
        </text:list-item>
        <text:list-item>
          <text:p text:style-name="P95">The developers of radare2</text:p>
          <text:p text:style-name="P94">https://www.radare.org</text:p>
        </text:list-item>
      </text:list>
      <text:p text:style-name="P99"/>
      <text:list text:continue-numbering="true" text:style-name="L1">
        <text:list-item>
          <text:p text:style-name="P100">The developers of <text:span text:style-name="T345">opencode</text:span></text:p>
          <text:p text:style-name="P101">https://opencode.ai/</text:p>
        </text:list-item>
      </text:list>
      <text:h text:style-name="P102" text:outline-level="1"/>
      <text:h text:style-name="Para" text:outline-level="1"><text:span text:style-name="T346">Image c</text:span>redits</text:h>
      <text:p text:style-name="P77"/>
      <text:p text:style-name="P103"><text:span text:style-name="T347">Th</text:span>e <text:span text:style-name="T348">graphics</text:span> are <text:span text:style-name="T348">partially original creations </text:span><text:span text:style-name="T2">by </text:span><text:span text:style-name="T348">Alberto Marnetto,</text:span><text:span text:style-name="T347"> partially </text:span><text:span text:style-name="T348">adaptations of the sprites of the original game</text:span><text:span text:style-name="T347">, </text:span><text:span text:style-name="T348">partially copies or derived works of the images</text:span><text:span text:style-name="T349"> </text:span><text:span text:style-name="T350">created by the authors </text:span><text:span text:style-name="T349">listed below</text:span><text:span text:style-name="T348">.</text:span><text:span text:style-name="T351"> </text:span><text:span text:style-name="T352">We </text:span><text:span text:style-name="T351">wish to express </text:span><text:span text:style-name="T352">ou</text:span><text:span text:style-name="T353">r</text:span><text:span text:style-name="T351"> gratitude to all who have published </text:span><text:span text:style-name="T354">pictures</text:span><text:span text:style-name="T351"> under a free license. This mod would have been </text:span><text:span text:style-name="T355">im</text:span><text:span text:style-name="T351">possible without their work.</text:span></text:p>
      <text:p text:style-name="P104"/>
      <text:p text:style-name="P105"><text:span text:style-name="T356">T</text:span><text:span text:style-name="T357">rack backgrounds and maps </text:span>are released under the <text:span text:style-name="T358">CC BY-SA </text:span>4.0 license.<text:span text:style-name="T357"> </text:span><text:span text:style-name="T359">You can extract them from the mod by using </text:span><text:span text:style-name="T360">the tool </text:span><text:span text:style-name="T361">S</text:span><text:span text:style-name="T362">tressed</text:span><text:span text:style-name="T360"> by Daniel Stien.</text:span><text:span text:style-name="T2"> </text:span><text:span text:style-name="T363">Since the</text:span><text:span text:style-name="T364"> images</text:span><text:span text:style-name="T363"> contain copyrighted work of other authors, i</text:span><text:span text:style-name="T359">f you wish to reuse them, p</text:span><text:span text:style-name="T360">lease </text:span><text:span text:style-name="T363">additionally </text:span><text:span text:style-name="T360">follow the license terms </text:span><text:span text:style-name="T365">shown in the “Copyright</text:span><text:span text:style-name="T366"> information</text:span><text:span text:style-name="T365">” section</text:span><text:span text:style-name="T360">. In case of doubt, feel free to </text:span><text:span text:style-name="T367">write at </text:span><text:span text:style-name="T360">alberto.m.dev@gmail.com</text:span><text:span text:style-name="T368"> </text:span><text:span text:style-name="T369">.</text:span></text:p>
      <text:p text:style-name="P106"/>
      <text:p text:style-name="P107">The other in-game graphics are copyright of Accolade or its successors.</text:p>
      <text:p text:style-name="P107"/>
      <text:h text:style-name="P108" text:outline-level="1">Copyright<text:span text:style-name="T370"> information</text:span></text:h>
      <text:p text:style-name="P109"/>
      <text:h text:style-name="P110" text:outline-level="2"><text:span text:style-name="T322">Source c</text:span>ode</text:h>
      <text:h text:style-name="P111" text:outline-level="2"/>
      <text:p text:style-name="P112">Author: Alberto Marnetto</text:p>
      <text:p text:style-name="P112">License: MIT</text:p>
      <text:p text:style-name="P113">URL:<text:line-break/><text:span text:style-name="T371">https://github.com/AlbertoMarnetto/don-matrelli-s-legacy</text:span></text:p>
      <text:p text:style-name="P107"/>
      <text:h text:style-name="Para2" text:outline-level="2">Pictures</text:h>
      <text:h text:style-name="P114" text:outline-level="2"/>
      <text:p text:style-name="Para3"><text:span text:style-name="T372">Manual cover</text:span> image</text:p>
      <text:p text:style-name="P115">Author: <text:span text:style-name="T358">Wi</text:span><text:span text:style-name="T373">ki</text:span><text:span text:style-name="T374">commons</text:span><text:span text:style-name="T373"> user “</text:span><text:span text:style-name="T375">Morio</text:span><text:span text:style-name="T373">”</text:span></text:p>
      <text:p text:style-name="P116">License: CC BY-SA <text:span text:style-name="T375">4</text:span>.0</text:p>
      <text:p text:style-name="P116">Original URL: </text:p>
      <text:p text:style-name="P117">https://commons.wikimedia.org/wiki/File:2015_Malaysian_GP_opening_lap.jpg</text:p>
      <text:p text:style-name="P116"/>
      <text:p text:style-name="Para3"><text:span text:style-name="T373">Baku</text:span><text:span text:style-name="T376"> </text:span><text:span text:style-name="T377">t</text:span><text:span text:style-name="T376">rack map</text:span></text:p>
      <text:p text:style-name="P118"><text:span text:style-name="T378">Author: </text:span>Wi<text:span text:style-name="T373">ki</text:span><text:span text:style-name="T374">commons</text:span><text:span text:style-name="T373"> user “HumanBodyPiloter5”</text:span></text:p>
      <text:p text:style-name="P118">License<text:span text:style-name="T379">: </text:span>CC0 1.0</text:p>
      <text:p text:style-name="P119">Original URL: </text:p>
      <text:p text:style-name="P120">https://commons.wikimedia.org/wiki/File:Baku_Formula_One_circuit_map.svg</text:p>
      <text:p text:style-name="P121"/>
      <text:p text:style-name="Para3"><text:span text:style-name="T373">Baku</text:span><text:span text:style-name="T376"> </text:span><text:span text:style-name="T380">background</text:span><text:span text:style-name="T381"> (1)</text:span></text:p>
      <text:p text:style-name="Standard"><text:span text:style-name="T382">Author</text:span><text:span text:style-name="T383">: </text:span><text:span text:style-name="T382">Liilia Moroz</text:span></text:p>
      <text:p text:style-name="P122">License<text:span text:style-name="T380">:</text:span> CC BY-SA <text:span text:style-name="T380">4</text:span>.0</text:p>
      <text:p text:style-name="P123">Original URL:</text:p>
      <text:p text:style-name="P124">https://commons.wikimedia.org/wiki/File:Panorama_of_Baku_from_the_sea.jpg</text:p>
      <text:p text:style-name="P125"/>
      <text:p text:style-name="Para3"><text:span text:style-name="T373">Baku</text:span><text:span text:style-name="T376"> </text:span><text:span text:style-name="T380">background</text:span><text:span text:style-name="T381"> (2)</text:span></text:p>
      <text:p text:style-name="P126"><text:span text:style-name="T382">Author</text:span><text:span text:style-name="T383">: Press Service of the President of the Republic of Azerbaijan </text:span></text:p>
      <text:p text:style-name="P127">License<text:span text:style-name="T380">:</text:span> CC BY <text:span text:style-name="T380">4</text:span>.0</text:p>
      <text:p text:style-name="P128">Original URL:</text:p>
      <text:p text:style-name="P129">https://commons.wikimedia.org/wiki/File:Ilham_Aliyev_watched_the_opening_ceremony_of_the_2018_Formula-1_Azerbaijan_Grand_Prix_and_final_race_35.jpg</text:p>
      <text:p text:style-name="P130"/>
      <text:p text:style-name="Para3"><text:span text:style-name="T373">Baku</text:span><text:span text:style-name="T376"> </text:span><text:span text:style-name="T380">background</text:span><text:span text:style-name="T381"> (</text:span><text:span text:style-name="T384">3</text:span><text:span text:style-name="T381">)</text:span></text:p>
      <text:p text:style-name="P131"><text:span text:style-name="T382">Author</text:span><text:span text:style-name="T383">: Diego Delso</text:span><text:span text:style-name="T385"> (delso.photo)</text:span></text:p>
      <text:p text:style-name="P132">License<text:span text:style-name="T380">:</text:span> CC BY-SA <text:span text:style-name="T380">4</text:span>.0</text:p>
      <text:p text:style-name="P133">Original URL:</text:p>
      <text:p text:style-name="P134">https://commons.wikimedia.org/wiki/File:Baku,_Azerbaiy%C3%A1n,_2016-09-28,_DD_29.jpg</text:p>
      <text:p text:style-name="P134"/>
      <text:p text:style-name="P135"><text:soft-page-break/><text:span text:style-name="T373">Baku</text:span><text:span text:style-name="T376"> </text:span><text:span text:style-name="T380">background</text:span><text:span text:style-name="T381"> (</text:span><text:span text:style-name="T386">4</text:span><text:span text:style-name="T381">)</text:span></text:p>
      <text:p text:style-name="P136"><text:span text:style-name="T382">Author</text:span><text:span text:style-name="T383">: Diego Delso</text:span><text:span text:style-name="T385"> (delso.photo)</text:span></text:p>
      <text:p text:style-name="P137">License<text:span text:style-name="T380">:</text:span> CC BY-SA <text:span text:style-name="T380">4</text:span>.0</text:p>
      <text:p text:style-name="P138">Original URL:</text:p>
      <text:p text:style-name="P134">https://commons.wikimedia.org/wiki/File:Vista_de_Baku,_Azerbaiy%C3%A1n,_2016-09-26,_DD_138.jpg</text:p>
      <text:p text:style-name="P139"/>
      <text:p text:style-name="Para3"><text:span text:style-name="T373">Baku</text:span><text:span text:style-name="T376"> </text:span><text:span text:style-name="T380">background</text:span><text:span text:style-name="T381"> (</text:span><text:span text:style-name="T387">5</text:span><text:span text:style-name="T381">)</text:span></text:p>
      <text:p text:style-name="P140"><text:span text:style-name="T382">Author</text:span><text:span text:style-name="T383">: www.dreamlight.az </text:span><text:span text:style-name="T388">– D</text:span><text:span text:style-name="T383">erivative work: </text:span><text:span text:style-name="T388">Wikicommons user “</text:span><text:span text:style-name="T383">Jjtkk</text:span><text:span text:style-name="T388">”</text:span></text:p>
      <text:p text:style-name="P141">License<text:span text:style-name="T380">:</text:span> CC BY-SA <text:span text:style-name="T389">3</text:span>.0</text:p>
      <text:p text:style-name="P133">Original URL:</text:p>
      <text:p text:style-name="P142">https://commons.wikimedia.org/wiki/File:Baku_banner.jpg</text:p>
      <text:p text:style-name="P142"/>
      <text:p text:style-name="Para3"><text:span text:style-name="T373">Baku</text:span><text:span text:style-name="T376"> </text:span><text:span text:style-name="T380">background</text:span><text:span text:style-name="T381"> (</text:span><text:span text:style-name="T387">6</text:span><text:span text:style-name="T381">)</text:span></text:p>
      <text:p text:style-name="P143">Author<text:span text:style-name="T381">: </text:span><text:span text:style-name="T389">Wikicommons user “</text:span><text:span text:style-name="T358">MrArifnajafov</text:span><text:span text:style-name="T389">”</text:span></text:p>
      <text:p text:style-name="P144">License<text:span text:style-name="T380">:</text:span> CC BY-SA <text:span text:style-name="T389">3</text:span>.0</text:p>
      <text:p text:style-name="P133">Original URL:</text:p>
      <text:p text:style-name="P145">https://commons.wikimedia.org/wiki/File:Panoramabild_Baku_Filarmonia_Park.JPG</text:p>
      <text:p text:style-name="P145"/>
      <text:p text:style-name="Para3"><text:span text:style-name="T373">Baku</text:span><text:span text:style-name="T376"> </text:span><text:span text:style-name="T380">background</text:span><text:span text:style-name="T381"> (</text:span><text:span text:style-name="T390">7</text:span><text:span text:style-name="T381">)</text:span></text:p>
      <text:p text:style-name="P146"><text:span text:style-name="T382">Author</text:span><text:span text:style-name="T383">: </text:span><text:span text:style-name="T391">Alberto Marnetto</text:span></text:p>
      <text:p text:style-name="P147">License<text:span text:style-name="T380">:</text:span> CC BY-SA <text:span text:style-name="T390">4</text:span>.0</text:p>
      <text:p text:style-name="P148"/>
      <text:p text:style-name="Para3">Spa-Francorchamps<text:span text:style-name="T376"> </text:span><text:span text:style-name="T377">t</text:span><text:span text:style-name="T376">rack map</text:span></text:p>
      <text:p text:style-name="P149"><text:span text:style-name="T378">Author: </text:span>Will Pittenger</text:p>
      <text:p text:style-name="P149">License<text:span text:style-name="T380">:</text:span> CC BY-SA 3.0</text:p>
      <text:p text:style-name="P150">Original URL:</text:p>
      <text:p text:style-name="P151">https://en.wikipedia.org/wiki/File:Spa-Francorchamps_of_Belgium.svg</text:p>
      <text:p text:style-name="P149"/>
      <text:p text:style-name="Para3"><text:span text:style-name="T392">Spa-Francorchamps</text:span><text:span text:style-name="T376"> </text:span><text:span text:style-name="T380">background</text:span><text:span text:style-name="T381"> (</text:span><text:span text:style-name="T393">1</text:span><text:span text:style-name="T381">)</text:span></text:p>
      <text:p text:style-name="P152"><text:span text:style-name="T382">Author</text:span><text:span text:style-name="T383">: </text:span><text:span text:style-name="T394">United Autosports</text:span></text:p>
      <text:p text:style-name="P153">License<text:span text:style-name="T380">:</text:span> CC BY-SA <text:span text:style-name="T392">2</text:span>.0</text:p>
      <text:p text:style-name="P154"><text:span text:style-name="T382">Original URL</text:span><text:span text:style-name="T395">s</text:span>:</text:p>
      <text:p text:style-name="P155">https://commons.wikimedia.org/wiki/File:2022_4_Hours_of_Spa-Francorchamps_-_Circuit.jpg</text:p>
      <text:p text:style-name="P155">https://www.flickr.com/photos/unitedautosports/52387982694/</text:p>
      <text:p text:style-name="P156"/>
      <text:p text:style-name="Para3"><text:span text:style-name="T393">Spa-Francorchamps</text:span><text:span text:style-name="T376"> </text:span><text:span text:style-name="T380">background</text:span><text:span text:style-name="T381"> (</text:span><text:span text:style-name="T393">2</text:span><text:span text:style-name="T381">)</text:span></text:p>
      <text:p text:style-name="P157"><text:span text:style-name="T382">Author</text:span><text:span text:style-name="T383">: </text:span><text:span text:style-name="T394">Jean-Pol G</text:span><text:span text:style-name="T396">randmont</text:span></text:p>
      <text:p text:style-name="P158">License<text:span text:style-name="T380">:</text:span> CC BY <text:span text:style-name="T389">3</text:span>.0</text:p>
      <text:p text:style-name="P133">Original URL:</text:p>
      <text:p text:style-name="P159">https://commons.wikimedia.org/wiki/File:Baileux_050608_(2).jpg</text:p>
      <text:p text:style-name="P160"/>
      <text:p text:style-name="P160"/>
      <text:p text:style-name="P160"/>
      <text:p text:style-name="Para3"><text:soft-page-break/><text:span text:style-name="T393">Spa-Francorchamps</text:span><text:span text:style-name="T376"> </text:span><text:span text:style-name="T380">background</text:span><text:span text:style-name="T381"> (</text:span><text:span text:style-name="T397">3</text:span><text:span text:style-name="T381">)</text:span></text:p>
      <text:p text:style-name="P161"><text:span text:style-name="T382">Author</text:span><text:span text:style-name="T383">: </text:span><text:span text:style-name="T398">Wikicommons user “FrDr”</text:span></text:p>
      <text:p text:style-name="P162">License<text:span text:style-name="T380">:</text:span> CC BY<text:span text:style-name="T397">-SA</text:span> <text:span text:style-name="T397">4</text:span>.0</text:p>
      <text:p text:style-name="P133">Original URL:</text:p>
      <text:p text:style-name="P145">https://commons.wikimedia.org/wiki/File:Circuit_de_Spa-Francorchamps_03.jpg</text:p>
      <text:p text:style-name="P145"/>
      <text:p text:style-name="P163"><text:span text:style-name="T393">Spa-Francorchamps</text:span><text:span text:style-name="T376"> </text:span><text:span text:style-name="T380">background</text:span><text:span text:style-name="T381"> (</text:span><text:span text:style-name="T387">4</text:span><text:span text:style-name="T381">)</text:span></text:p>
      <text:p text:style-name="P164"><text:span text:style-name="T382">Author</text:span><text:span text:style-name="T383">: </text:span><text:span text:style-name="T398">Wikicommons user “FrDr”</text:span></text:p>
      <text:p text:style-name="P165">License<text:span text:style-name="T380">:</text:span> CC BY<text:span text:style-name="T397">-SA</text:span> <text:span text:style-name="T397">4</text:span>.0</text:p>
      <text:p text:style-name="P166">Original URL:</text:p>
      <text:p text:style-name="P167">https://commons.wikimedia.org/wiki/File:Circuit_de_Spa-Francorchamps_14.jpg</text:p>
      <text:p text:style-name="P145"/>
      <text:p text:style-name="Para3"><text:span text:style-name="T390">Spa-Francorchamps</text:span><text:span text:style-name="T376"> </text:span><text:span text:style-name="T380">background</text:span><text:span text:style-name="T381"> (</text:span><text:span text:style-name="T390">5</text:span><text:span text:style-name="T381">)</text:span></text:p>
      <text:p text:style-name="P146"><text:span text:style-name="T382">Author</text:span><text:span text:style-name="T383">: </text:span><text:span text:style-name="T391">Alberto Marnetto</text:span></text:p>
      <text:p text:style-name="P147">License<text:span text:style-name="T380">:</text:span> CC BY-SA <text:span text:style-name="T390">4</text:span>.0</text:p>
      <text:p text:style-name="P147"/>
      <text:p text:style-name="Para3"><text:span text:style-name="T390">Möbius</text:span><text:span text:style-name="T376"> </text:span><text:span text:style-name="T380">background</text:span></text:p>
      <text:p text:style-name="P146"><text:span text:style-name="T382">Author</text:span><text:span text:style-name="T383">: </text:span><text:span text:style-name="T391">Alberto Marnetto</text:span></text:p>
      <text:p text:style-name="P147">License<text:span text:style-name="T380">:</text:span> CC BY-SA <text:span text:style-name="T390">4</text:span>.0</text:p>
      <text:p text:style-name="P148"/>
      <text:p text:style-name="P148"/>
      <text:h text:style-name="P168" text:outline-level="2">Licence texts</text:h>
      <text:p text:style-name="P169"/>
      <text:p text:style-name="P170">CC0 1.0<text:span text:style-name="T373">: https://creativecommons.org/publicdomain/zero/1.0/deed.en</text:span></text:p>
      <text:p text:style-name="P171">CC BY 3.0 : https://creativecommons.org/licenses/by/3.0/deed.en</text:p>
      <text:p text:style-name="P172">CC BY-SA 3.0 <text:span text:style-name="T399">: </text:span>https://creativecommons.org/licenses/by-sa/2.0/deed.en</text:p>
      <text:p text:style-name="P173">CC BY-SA 3.0 <text:span text:style-name="T399">: </text:span>https://creativecommons.org/licenses/by-sa/3.0/deed.en</text:p>
      <text:p text:style-name="P122">CC BY-SA <text:span text:style-name="T380">4</text:span>.0<text:span text:style-name="T380"> : https://creativecommons.org/licenses/by-sa/4.0/deed.en</text:span></text:p>
      <text:p text:style-name="P174">MIT: https://mit-license.or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BeeZee" svg:font-family="ABeeZee"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master-page-name="">
      <style:paragraph-properties fo:margin-left="1cm" fo:margin-right="1cm" fo:margin-top="0cm" fo:margin-bottom="0cm" style:contextual-spacing="true" fo:text-indent="0cm" style:auto-text-indent="false" style:page-number="auto"/>
      <style:text-properties fo:font-size="9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Para" style:family="paragraph" style:parent-style-name="Standard" style:default-outline-level="1" style:list-style-name="">
      <style:text-properties fo:font-size="14pt" fo:font-weight="bold"/>
    </style:style>
    <style:style style:name="Para2" style:family="paragraph" style:parent-style-name="Standard" style:default-outline-level="2" style:list-style-name="">
      <style:text-properties fo:font-size="11pt" fo:font-weight="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0.301cm" style:type="right" style:leader-style="dotted" style:leader-text="."/>
        </style:tab-stops>
      </style:paragraph-properties>
    </style:style>
    <style:style style:name="Para3" style:family="paragraph" style:parent-style-name="Standard">
      <style:text-properties fo:font-weight="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2T11:01:03.956905050</meta:creation-date>
    <dc:date>2026-06-22T17:15:51.921436392</dc:date>
    <meta:editing-duration>P1DT19H38M35S</meta:editing-duration>
    <meta:editing-cycles>589</meta:editing-cycles>
    <meta:generator>LibreOffice/25.2.3.2$Linux_X86_64 LibreOffice_project/520$Build-2</meta:generator>
    <meta:print-date>2026-06-18T19:05:12.854452534</meta:print-date>
    <meta:printed-by>PDF files</meta:printed-by>
    <meta:document-statistic meta:table-count="0" meta:image-count="5" meta:object-count="0" meta:page-count="15" meta:paragraph-count="195" meta:word-count="3503" meta:character-count="22064" meta:non-whitespace-character-count="18751"/>
  </office:meta>
</office:document-meta>
</file>